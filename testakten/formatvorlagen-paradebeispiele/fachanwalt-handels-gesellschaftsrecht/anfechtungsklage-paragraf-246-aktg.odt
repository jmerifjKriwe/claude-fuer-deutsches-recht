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automatic-styles>
    <style:style style:name="Disclaimer" style:family="paragraph" style:parent-style-name="Default" style:display-name="Disclaimer">
      <style:text-properties style:font-name="Times New Roman" fo:font-size="10pt" fo:font-style="italic" fo:color="#444444"/>
      <style:paragraph-properties fo:text-align="justify" fo:margin-bottom="0.4cm"/>
    </style:style>
    <style:style style:name="H1" style:family="paragraph" style:parent-style-name="Default" style:display-name="H1">
      <style:text-properties style:font-name="Times New Roman" fo:font-size="16pt" fo:font-weight="bold"/>
      <style:paragraph-properties fo:text-align="left" fo:margin-top="0.4cm" fo:margin-bottom="0.2cm"/>
    </style:style>
    <style:style style:name="H2" style:family="paragraph" style:parent-style-name="Default" style:display-name="H2">
      <style:text-properties style:font-name="Times New Roman" fo:font-size="13pt" fo:font-weight="bold"/>
      <style:paragraph-properties fo:text-align="left" fo:margin-top="0.4cm" fo:margin-bottom="0.2cm"/>
    </style:style>
    <style:style style:name="H3" style:family="paragraph" style:parent-style-name="Default" style:display-name="H3">
      <style:text-properties style:font-name="Times New Roman" fo:font-size="11.5pt" fo:font-weight="bold"/>
      <style:paragraph-properties fo:text-align="left" fo:margin-top="0.4cm" fo:margin-bottom="0.2cm"/>
    </style:style>
    <style:style style:name="CenterBold" style:family="paragraph" style:parent-style-name="Default" style:display-name="CenterBold">
      <style:text-properties style:font-name="Times New Roman" fo:font-size="12pt" fo:font-weight="bold"/>
      <style:paragraph-properties fo:text-align="center" fo:margin-bottom="0.2cm"/>
    </style:style>
    <style:style style:name="Center" style:family="paragraph" style:parent-style-name="Default" style:display-name="Center">
      <style:text-properties style:font-name="Times New Roman" fo:font-size="11pt"/>
      <style:paragraph-properties fo:text-align="center" fo:margin-bottom="0.2cm"/>
    </style:style>
  </office:automatic-styles>
  <office:body>
    <office:text>
      <text:p text:style-name="Disclaimer">Achtung: Dies ist eine experimentelle KI-Vorlage. Keine Haftung, keine Gewaehr. Nur zum Ausprobieren der Skills und einer KI; keine Rechtsberatung. Vor jeder Verwendung im Mandat anwaltlich pruefen.</text:p>
      <text:p text:style-name="Default"/>
      <text:h text:style-name="H1" text:outline-level="1">Anfechtungsklage Hauptversammlungsbeschluss ($ 246 AktG)</text:h>
      <text:p text:style-name="Center">An das Landgericht [Sitz Gesellschaft] — Kammer fuer Handelssachen —</text:p>
      <text:p text:style-name="CenterBold">Anfechtungsklage</text:p>
      <text:p text:style-name="Default"/>
      <text:p text:style-name="Default">des / der</text:p>
      <text:p text:style-name="Default">[Aktionaer Name], [Anschrift], Aktionaer:in mit [Anzahl] Aktien</text:p>
      <text:p text:style-name="Default">— Klaeger:in —</text:p>
      <text:p text:style-name="Default">vertreten durch [Anwalt]</text:p>
      <text:p text:style-name="Default"/>
      <text:p text:style-name="Default">gegen</text:p>
      <text:p text:style-name="Default">[Gesellschaft AG/SE], [Anschrift], vertreten durch den Vorstand</text:p>
      <text:p text:style-name="Default">— Beklagte —</text:p>
      <text:h text:style-name="H2" text:outline-level="2">Antraege</text:h>
      <text:p text:style-name="Default">1. Der in der Hauptversammlung der Beklagten vom [Datum HV] gefasste Beschluss zu TOP [Nr.] mit folgendem Inhalt: "[Beschluss-Wortlaut]" wird fuer nichtig erklaert ($ 246 Abs. 1 AktG).</text:p>
      <text:p text:style-name="Default">2. Die Kosten des Rechtsstreits werden der Beklagten auferlegt.</text:p>
      <text:h text:style-name="H2" text:outline-level="2">Begruendung</text:h>
      <text:h text:style-name="H3" text:outline-level="3">1. Klagefrist $ 246 Abs. 1 AktG</text:h>
      <text:p text:style-name="Default">Die HV fand am [Datum] statt; die Klage wird binnen eines Monats nach dem Beschluss erhoben. Frist gewahrt.</text:p>
      <text:h text:style-name="H3" text:outline-level="3">2. Anfechtungsbefugnis $ 245 AktG</text:h>
      <text:p text:style-name="Default">Die Klaegerseite ist Aktionaer:in der Beklagten ($ 245 Nr. 1 AktG), in der HV erschienen, hat Widerspruch zur Niederschrift erklaert (Anlage A1: Niederschrift, Anlage A2: Widerspruchserklaerung).</text:p>
      <text:h text:style-name="H3" text:outline-level="3">3. Anfechtungsgruende $ 243 AktG</text:h>
      <text:p text:style-name="Default">Der Beschluss verstoesst gegen Gesetz oder Satzung ($ 243 Abs. 1 AktG): [Konkreter Verstoss, z. B. Verletzung des Auskunftsrechts $ 131 AktG / Verletzung des Beschlusses-Quorums / Verletzung Treuepflicht].</text:p>
      <text:p text:style-name="Default">[Konkrete Subsumtion mit Tatsachenangaben.]</text:p>
      <text:h text:style-name="H2" text:outline-level="2">Beweismittel</text:h>
      <text:p text:style-name="Default">Anlage A1: HV-Niederschrift</text:p>
      <text:p text:style-name="Default">Anlage A2: Widerspruchserklaerung</text:p>
      <text:p text:style-name="Default">Anlage A3: Tagesordnung + Einladung</text:p>
      <text:p text:style-name="Default">Zeugen [Namen]</text:p>
      <text:p text:style-name="Default">Parteivernehmung Klaegerseite</text:p>
      <text:p text:style-name="Default"/>
      <text:p text:style-name="Default">[Ort], [Datum]</text:p>
      <text:p text:style-name="Default">_______________________________</text:p>
      <text:p text:style-name="Default">[Anwalt]</text:p>
      <text:p text:style-name="Default"/>
      <text:h text:style-name="H3" text:outline-level="3">Felder im Template</text:h>
      <text:p text:style-name="Default">• [Aktionaer + Anschrift]</text:p>
      <text:p text:style-name="Default">• [Aktienanzahl]</text:p>
      <text:p text:style-name="Default">• [Gesellschaft]</text:p>
      <text:p text:style-name="Default">• [Sitz Gesellschaft]</text:p>
      <text:p text:style-name="Default">• [Datum HV]</text:p>
      <text:p text:style-name="Default">• [Beschluss-TOP + Wortlaut]</text:p>
      <text:p text:style-name="Default">• [Konkreter Verstoss]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styles>
    <style:style style:name="Default" style:family="paragraph" style:display-name="Default">
      <style:text-properties style:font-name="Times New Roman" fo:font-size="11pt"/>
      <style:paragraph-properties fo:text-align="justify" fo:margin-bottom="0.2cm"/>
    </style:style>
  </office:styles>
  <office:automatic-styles>
    <style:page-layout style:name="Standard">
      <style:page-layout-properties fo:page-width="21cm" fo:page-height="29.7cm" fo:margin-top="2.5cm" fo:margin-bottom="2.5cm" fo:margin-left="2.5cm" fo:margin-right="2.5cm" style:writing-mode="lr-tb"/>
    </style:page-layout>
  </office:automatic-styles>
  <office:master-styles>
    <style:master-page style:name="Standard" style:page-layout-name="Standard" style:display-name="Standard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2</meta:generator>
  </office:meta>
</office:document-meta>
</file>