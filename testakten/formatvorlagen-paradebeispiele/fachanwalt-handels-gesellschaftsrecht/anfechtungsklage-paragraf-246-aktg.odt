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Anfechtungsklage Hauptversammlungsbeschluss ($ 246 AktG)</text:h>
      <text:p text:style-name="Center">An das Landgericht [Sitz Gesellschaft] — Kammer fuer Handelssachen —</text:p>
      <text:p text:style-name="CenterBold">Anfechtungsklage</text:p>
      <text:p text:style-name="Default"/>
      <text:p text:style-name="Default">des / der</text:p>
      <text:p text:style-name="Default">[Aktionaer Name], [Anschrift], Aktionaer:in mit [Anzahl] Aktien</text:p>
      <text:p text:style-name="Default">— Klaeger:in —</text:p>
      <text:p text:style-name="Default">vertreten durch [Anwalt]</text:p>
      <text:p text:style-name="Default"/>
      <text:p text:style-name="Default">gegen</text:p>
      <text:p text:style-name="Default">[Gesellschaft AG/SE], [Anschrift], vertreten durch den Vorstand</text:p>
      <text:p text:style-name="Default">— Beklagte —</text:p>
      <text:h text:style-name="H2" text:outline-level="2">Antraege</text:h>
      <text:p text:style-name="Default">1. Der in der Hauptversammlung der Beklagten vom [Datum HV] gefasste Beschluss zu TOP [Nr.] mit folgendem Inhalt: "[Beschluss-Wortlaut]" wird fuer nichtig erklaert ($ 246 Abs. 1 AktG).</text:p>
      <text:p text:style-name="Default">2. Die Kosten des Rechtsstreits werden der Beklagten auferlegt.</text:p>
      <text:h text:style-name="H2" text:outline-level="2">Begruendung</text:h>
      <text:h text:style-name="H3" text:outline-level="3">1. Klagefrist $ 246 Abs. 1 AktG</text:h>
      <text:p text:style-name="Default">Die HV fand am [Datum] statt; die Klage wird binnen eines Monats nach dem Beschluss erhoben. Frist gewahrt.</text:p>
      <text:h text:style-name="H3" text:outline-level="3">2. Anfechtungsbefugnis $ 245 AktG</text:h>
      <text:p text:style-name="Default">Die Klaegerseite ist Aktionaer:in der Beklagten ($ 245 Nr. 1 AktG), in der HV erschienen, hat Widerspruch zur Niederschrift erklaert (Anlage A1: Niederschrift, Anlage A2: Widerspruchserklaerung).</text:p>
      <text:h text:style-name="H3" text:outline-level="3">3. Anfechtungsgruende $ 243 AktG</text:h>
      <text:p text:style-name="Default">Der Beschluss verstoesst gegen Gesetz oder Satzung ($ 243 Abs. 1 AktG): [Konkreter Verstoss, z. B. Verletzung des Auskunftsrechts $ 131 AktG / Verletzung des Beschlusses-Quorums / Verletzung Treuepflicht].</text:p>
      <text:p text:style-name="Default">[Konkrete Subsumtion mit Tatsachenangaben.]</text:p>
      <text:h text:style-name="H2" text:outline-level="2">Beweismittel</text:h>
      <text:p text:style-name="Default">Anlage A1: HV-Niederschrift</text:p>
      <text:p text:style-name="Default">Anlage A2: Widerspruchserklaerung</text:p>
      <text:p text:style-name="Default">Anlage A3: Tagesordnung + Einladung</text:p>
      <text:p text:style-name="Default">Zeugen [Namen]</text:p>
      <text:p text:style-name="Default">Parteivernehmung Klaegerseite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Aktionaer + Anschrift]</text:p>
      <text:p text:style-name="Default">• [Aktienanzahl]</text:p>
      <text:p text:style-name="Default">• [Gesellschaft]</text:p>
      <text:p text:style-name="Default">• [Sitz Gesellschaft]</text:p>
      <text:p text:style-name="Default">• [Datum HV]</text:p>
      <text:p text:style-name="Default">• [Beschluss-TOP + Wortlaut]</text:p>
      <text:p text:style-name="Default">• [Konkreter Verstos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