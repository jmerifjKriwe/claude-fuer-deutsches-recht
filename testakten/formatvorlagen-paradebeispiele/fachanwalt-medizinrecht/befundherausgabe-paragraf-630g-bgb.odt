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Aufforderung zur Herausgabe der Behandlungsdokumentation ($ 630g BGB)</text:h>
      <text:p text:style-name="Center">An die [Klinik / Praxis] [Name]</text:p>
      <text:p text:style-name="Center">[Anschrift]</text:p>
      <text:p text:style-name="Default"/>
      <text:p text:style-name="Default">Patientensache: [Patientenname], geboren [Datum]</text:p>
      <text:p text:style-name="Default">Behandlungszeitraum: [von - bis]</text:p>
      <text:p text:style-name="Default">Aktenzeichen Klinik: [Pat.-Nr.]</text:p>
      <text:p text:style-name="CenterBold">Antrag auf Einsichtnahme und Kopien der Behandlungsdokumentation</text:p>
      <text:p text:style-name="Default">Sehr geehrte Damen und Herren,</text:p>
      <text:p text:style-name="Default">namens und in Vollmacht des oben genannten Patienten (Vollmacht als Anlage V1) bitte ich Sie um Einsichtnahme in die vollstaendige Patientenakte sowie um Aushaendigung von Kopien aller Behandlungsunterlagen gem. $ 630g Abs. 1 und 2 BGB.</text:p>
      <text:p text:style-name="Default">Der Anspruch umfasst:</text:p>
      <text:p text:style-name="Default">- vollstaendige Behandlungsdokumentation ($ 630f BGB)</text:p>
      <text:p text:style-name="Default">- alle bildgebenden Befunde (Roentgen, CT, MRT, Sonographie)</text:p>
      <text:p text:style-name="Default">- Laborbefunde, EKGs, OP-Berichte, Anaesthesieprotokolle, Pflegedokumentation</text:p>
      <text:p text:style-name="Default">- Korrespondenz mit weiteren Behandlern</text:p>
      <text:p text:style-name="Default">- ePA-Daten (sofern angeschlossen)</text:p>
      <text:h text:style-name="H2" text:outline-level="2">Form und Frist</text:h>
      <text:p text:style-name="Default">Wir bitten um Aushaendigung in elektronischer Form (PDF, DICOM-Bilder) per beA an die unten genannte Adresse. Hilfsweise per Post.</text:p>
      <text:p text:style-name="Default">Frist: 14 Tage ab Zugang dieses Schreibens. Bei Fristablauf werden wir die Herausgabe gerichtlich nach $ 630g BGB durchsetzen und die hierdurch entstehenden Kosten geltend machen.</text:p>
      <text:h text:style-name="H2" text:outline-level="2">Kostentragung</text:h>
      <text:p text:style-name="Default">Die durch die Anfertigung von Kopien entstehenden Kosten werden vom Patienten getragen ($ 630g Abs. 2 Satz 2 BGB). Bitte teilen Sie die voraussichtlichen Kosten vorab mit.</text:p>
      <text:h text:style-name="H2" text:outline-level="2">Rechtlicher Hintergrund</text:h>
      <text:p text:style-name="Default">Das Einsichtsrecht ist umfassend und kann nur in seltenen Ausnahmefaellen ($ 630g Abs. 1 Satz 1 BGB: erhebliche therapeutische Gruende / Rechte Dritter) verweigert werden; Einschraenkungen sind zu begruenden. Verweigerungsentscheidungen sind anfechtbar.</text:p>
      <text:p text:style-name="Default">Mit freundlichen Gruessen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Klinik/Praxis Name + Anschrift]</text:p>
      <text:p text:style-name="Default">• [Patientenname + Geburtsdatum]</text:p>
      <text:p text:style-name="Default">• [Behandlungszeitraum]</text:p>
      <text:p text:style-name="Default">• [Pat.-Nr.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