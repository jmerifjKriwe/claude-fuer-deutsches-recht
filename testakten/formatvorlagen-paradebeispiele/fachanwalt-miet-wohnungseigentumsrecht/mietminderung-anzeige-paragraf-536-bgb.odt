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Arbeitsvorlage. Keine Haftung, keine Gewähr. Nur zum Ausprobieren der Workflows; keine Rechtsberatung. Vor jeder Verwendung im Mandat anwaltlich prüfen.</text:p>
      <text:p text:style-name="Default"/>
      <text:h text:style-name="H1" text:outline-level="1">Mietminderungsanzeige ($ 536 i. V. m. $ 536c BGB)</text:h>
      <text:p text:style-name="Center">An [Vermieter/Hausverwaltung]</text:p>
      <text:p text:style-name="Center">[Anschrift]</text:p>
      <text:p text:style-name="Default"/>
      <text:p text:style-name="Default">Mietverhaeltnis Wohnobjekt [Adresse Wohnung]</text:p>
      <text:p text:style-name="Default">Mietvertrag vom [Datum]</text:p>
      <text:p text:style-name="CenterBold">Mangelanzeige und Mietminderung</text:p>
      <text:h text:style-name="H2" text:outline-level="2">1. Mangel</text:h>
      <text:p text:style-name="Default">Sehr geehrte Damen und Herren,</text:p>
      <text:p text:style-name="Default">hiermit zeigen wir Ihnen — namens und in Vollmacht unserer Mandantschaft, Frau/Herrn [Mietername], wohnhaft in der oben genannten Wohnung — die folgenden Maengel der Mietsache an ($ 536c BGB):</text:p>
      <text:p text:style-name="Default">[Beschreibung des Mangels, z. B. Schimmelbildung im Schlafzimmer / Heizungsausfall / Wasserschaden in der Kueche]</text:p>
      <text:p text:style-name="Default">Der Mangel besteht seit [Datum]. Beweismittel: [Fotos, Sachverstaendigengutachten, Zeugen]. Anlagen [Aufzaehlung].</text:p>
      <text:h text:style-name="H2" text:outline-level="2">2. Mietminderung</text:h>
      <text:p text:style-name="Default">Aufgrund des Mangels mindert sich die Miete kraft Gesetzes nach $ 536 Abs. 1 BGB. Die Mietminderung ist nicht von einer Erklaerung abhaengig, sondern tritt automatisch ein (BGH VIII ARZ 2/02 v. 17.07.2002, live verifizieren auf bundesgerichtshof.de).</text:p>
      <text:p text:style-name="Default">Wir setzen die Mietminderung mit Wirkung ab [Datum] auf [Prozentsatz] % der Bruttokaltmiete an. Dies entspricht einer monatlichen Minderung von [Betrag] EUR.</text:p>
      <text:h text:style-name="H2" text:outline-level="2">3. Fristsetzung zur Mangelbeseitigung</text:h>
      <text:p text:style-name="Default">Wir setzen Ihnen hiermit eine Frist zur Mangelbeseitigung bis zum [Datum, mindestens 14 Tage].</text:p>
      <text:p text:style-name="Default">Sollte die Mangelbeseitigung nicht fristgerecht erfolgen, behaelt sich unsere Mandantschaft folgende Rechte vor:</text:p>
      <text:p text:style-name="Default">- Ersatzvornahme auf Kosten des Vermieters ($ 536a Abs. 2 BGB)</text:p>
      <text:p text:style-name="Default">- Schadensersatz ($ 536a Abs. 1 BGB)</text:p>
      <text:p text:style-name="Default">- Ausserordentliche Kuendigung ($ 543 Abs. 2 Nr. 1 BGB) bei nicht-Behebung wesentlicher Maengel</text:p>
      <text:p text:style-name="Default">- Klage auf Mangelbeseitigung ($ 535 Abs. 1 Satz 2 BGB)</text:p>
      <text:h text:style-name="H2" text:outline-level="2">4. Zurueckbehaltungsrecht</text:h>
      <text:p text:style-name="Default">Soweit die Mangelbeseitigung weiterhin unterbleibt, behaelt sich die Mandantschaft die Geltendmachung eines Zurueckbehaltungsrechts an der nicht durch Minderung erfassten Restmiete vor ($ 320 BGB).</text:p>
      <text:p text:style-name="Default">Mit freundlichen Gruessen</text:p>
      <text:p text:style-name="Default"/>
      <text:p text:style-name="Default">_______________________________</text:p>
      <text:p text:style-name="Default">[Rechtsanwalt/Rechtsanwaeltin]</text:p>
      <text:p text:style-name="Default"/>
      <text:h text:style-name="H3" text:outline-level="3">Felder im Template</text:h>
      <text:p text:style-name="Default">• [Mietername]</text:p>
      <text:p text:style-name="Default">• [Adresse Wohnung]</text:p>
      <text:p text:style-name="Default">• [Mangelbeschreibung]</text:p>
      <text:p text:style-name="Default">• [Mangel-Beginn]</text:p>
      <text:p text:style-name="Default">• [Minderungs-Prozentsatz]</text:p>
      <text:p text:style-name="Default">• [Frist Mangelbeseitigung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