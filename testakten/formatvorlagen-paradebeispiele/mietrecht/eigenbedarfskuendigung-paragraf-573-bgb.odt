
<file path=META-INF/manifest.xml><?xml version="1.0" encoding="utf-8"?>
<manifest:manifest xmlns:office="urn:oasis:names:tc:opendocument:xmlns:office:1.0" xmlns:text="urn:oasis:names:tc:opendocument:xmlns:text:1.0" xmlns:meta="urn:oasis:names:tc:opendocument:xmlns:meta:1.0" xmlns:style="urn:oasis:names:tc:opendocument:xmlns:style:1.0" xmlns:svg="urn:oasis:names:tc:opendocument:xmlns:svg-compatib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svg="urn:oasis:names:tc:opendocument:xmlns:svg-compatib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font-face-decls>
    <style:font-face style:name="Times New Roman" svg:font-family="Times New Roman" style:font-family-generic="roman" style:font-pitch="variable"/>
  </office:font-face-decls>
  <office:automatic-styles>
    <style:style style:name="Disclaimer" style:family="paragraph" style:parent-style-name="Default" style:display-name="Disclaimer">
      <style:text-properties style:font-name="Times New Roman" fo:font-size="10pt" fo:font-style="italic" fo:color="#444444"/>
      <style:paragraph-properties fo:text-align="justify" fo:margin-bottom="0.4cm"/>
    </style:style>
    <style:style style:name="H1" style:family="paragraph" style:parent-style-name="Default" style:display-name="H1">
      <style:text-properties style:font-name="Times New Roman" fo:font-size="16pt" fo:font-weight="bold"/>
      <style:paragraph-properties fo:text-align="left" fo:margin-top="0.4cm" fo:margin-bottom="0.2cm"/>
    </style:style>
    <style:style style:name="H2" style:family="paragraph" style:parent-style-name="Default" style:display-name="H2">
      <style:text-properties style:font-name="Times New Roman" fo:font-size="13pt" fo:font-weight="bold"/>
      <style:paragraph-properties fo:text-align="left" fo:margin-top="0.4cm" fo:margin-bottom="0.2cm"/>
    </style:style>
    <style:style style:name="H3" style:family="paragraph" style:parent-style-name="Default" style:display-name="H3">
      <style:text-properties style:font-name="Times New Roman" fo:font-size="11.5pt" fo:font-weight="bold"/>
      <style:paragraph-properties fo:text-align="left" fo:margin-top="0.4cm" fo:margin-bottom="0.2cm"/>
    </style:style>
    <style:style style:name="CenterBold" style:family="paragraph" style:parent-style-name="Default" style:display-name="CenterBold">
      <style:text-properties style:font-name="Times New Roman" fo:font-size="12pt" fo:font-weight="bold"/>
      <style:paragraph-properties fo:text-align="center" fo:margin-bottom="0.2cm"/>
    </style:style>
    <style:style style:name="Center" style:family="paragraph" style:parent-style-name="Default" style:display-name="Center">
      <style:text-properties style:font-name="Times New Roman" fo:font-size="11pt"/>
      <style:paragraph-properties fo:text-align="center" fo:margin-bottom="0.2cm"/>
    </style:style>
  </office:automatic-styles>
  <office:body>
    <office:text>
      <text:p text:style-name="Disclaimer">Achtung: Dies ist eine experimentelle Arbeitsvorlage. Keine Haftung, keine Gewähr. Nur zum Ausprobieren der Workflows; keine Rechtsberatung. Vor jeder Verwendung im Mandat anwaltlich prüfen.</text:p>
      <text:p text:style-name="Default"/>
      <text:h text:style-name="H1" text:outline-level="1">Eigenbedarfskuendigung Wohnraum ($ 573 II Nr. 2 BGB)</text:h>
      <text:p text:style-name="Center">[Vermieter Name + Anschrift]</text:p>
      <text:p text:style-name="Center">[Mieter Name + Anschrift]</text:p>
      <text:p text:style-name="Default"/>
      <text:p text:style-name="Default">Mietverhaeltnis Wohnung [Adresse]</text:p>
      <text:p text:style-name="Default">Mietvertrag vom [Datum]</text:p>
      <text:p text:style-name="CenterBold">Ordentliche Kuendigung wegen Eigenbedarfs</text:p>
      <text:p text:style-name="Default">Sehr geehrte Frau / sehr geehrter Herr [Mietername],</text:p>
      <text:p text:style-name="Default">hiermit kuendige(n) ich/wir das oben genannte Mietverhaeltnis nach $$ 573, 573c BGB ordentlich zum [Beendigungsdatum].</text:p>
      <text:h text:style-name="H2" text:outline-level="2">1. Kuendigungsgrund — Eigenbedarf</text:h>
      <text:p text:style-name="Default">Ich/Wir benoetige(n) die Mietsache fuer [konkreten Begueneditigten Person: Vermieter selbst / Kind / Eltern / Pflegekraft / sonstige Familienangehoerige] aus folgenden Gruenden:</text:p>
      <text:p text:style-name="Default">[Konkrete Lebenssituation: z. B. Heimkehr des Sohnes aus dem Auslandsstudium / Pflegebeduerftigkeit der Mutter, die in der Naehe wohnen soll / Arbeitsplatzwechsel der Tochter / Beendigung Trennungssituation].</text:p>
      <text:p text:style-name="Default">*Hinweis: Eigenbedarf muss "vernuenftige, nachvollziehbare Gruende" haben (BGH VIII ZR 21/19, live verifizieren); zur Substantiierung ist konkrete Schilderung der Lebensumstaende noetig.*</text:p>
      <text:h text:style-name="H2" text:outline-level="2">2. Kuendigungsfrist $ 573c I BGB</text:h>
      <text:p text:style-name="Default">Bei Wohndauer Mieter ueber 8 Jahre: 9 Monate; ueber 5 Jahre: 6 Monate; bis 5 Jahre: 3 Monate. Hier: Wohndauer seit [Einzugsdatum]; Frist [Monate].</text:p>
      <text:h text:style-name="H2" text:outline-level="2">3. Hinweis auf Widerspruchsrecht $ 574 BGB</text:h>
      <text:p text:style-name="Default">Sie haben das Recht, der Kuendigung bis spaetestens zwei Monate vor Beendigung des Mietverhaeltnisses zu widersprechen, wenn die Beendigung fuer Sie, Ihre Familie oder einen anderen Angehoerigen Ihres Haushalts eine Haerte bedeuten wuerde, die auch unter Wuerdigung der berechtigten Interessen des Vermieters nicht zu rechtfertigen ist (Sozialklausel).</text:p>
      <text:h text:style-name="H2" text:outline-level="2">4. Anbietpflicht</text:h>
      <text:p text:style-name="Default">Eine vergleichbare Alternativwohnung im Hause / nebengelegen ist [nicht vorhanden / vorhanden — wird parallel angeboten].</text:p>
      <text:p text:style-name="Default"/>
      <text:p text:style-name="Default">Mit freundlichen Gruessen</text:p>
      <text:p text:style-name="Default"/>
      <text:p text:style-name="Default">[Vermieter]</text:p>
      <text:p text:style-name="Default"/>
      <text:p text:style-name="Default">Anlagen: ggf. Vollmacht</text:p>
      <text:h text:style-name="H2" text:outline-level="2">Wichtiger Hinweis fuer den Vermieter (im Mandat)</text:h>
      <text:p text:style-name="Default">(1) Eigenbedarf muss IM Kuendigungsschreiben substantiiert begruendet werden — nachschieben spaeter ist problematisch.</text:p>
      <text:p text:style-name="Default">(2) Bei vorgetaeuschtem Eigenbedarf: Schadensersatzrisiko nach $ 280 I BGB, BGH VIII ZR 232/15 (Umzugskosten, Maklerkosten, hoehere Folge-Miete). Daher Eigenbedarf NUR ankuendigen, wenn er tatsaechlich besteht.</text:p>
      <text:p text:style-name="Default">(3) Bei Eigenbedarf einer GbR-Gesellschaft: BGH VIII ZR 271/06 (Gesellschafter-Eigenbedarf moeglich, wenn GbR Vermieter ist).</text:p>
      <text:p text:style-name="Default">(4) Sozialklausel $ 574 BGB: bei langjaehrigen Mietern / hohem Alter / Krankheit / Verwurzelung am Ort meist Abwaegung; Vermieter braucht plausible Alternativ-Argumentation.</text:p>
      <text:p text:style-name="Default"/>
      <text:h text:style-name="H3" text:outline-level="3">Felder im Template</text:h>
      <text:p text:style-name="Default">• [Vermieter Name + Anschrift]</text:p>
      <text:p text:style-name="Default">• [Mieter Name + Anschrift]</text:p>
      <text:p text:style-name="Default">• [Wohnungsadresse]</text:p>
      <text:p text:style-name="Default">• [Mietvertrag-Datum]</text:p>
      <text:p text:style-name="Default">• [Beendigungsdatum]</text:p>
      <text:p text:style-name="Default">• [Beguenstigte Person + Gruende]</text:p>
      <text:p text:style-name="Default">• [Einzugsdatum]</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svg="urn:oasis:names:tc:opendocument:xmlns:svg-compatib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font-face-decls>
    <style:font-face style:name="Times New Roman" svg:font-family="Times New Roman" style:font-family-generic="roman" style:font-pitch="variable"/>
  </office:font-face-decls>
  <office:styles>
    <style:style style:name="Default" style:family="paragraph" style:display-name="Default">
      <style:text-properties style:font-name="Times New Roman" fo:font-size="11pt"/>
      <style:paragraph-properties fo:text-align="justify" fo:margin-bottom="0.2cm"/>
    </style:style>
  </office:styles>
  <office:automatic-styles>
    <style:page-layout style:name="Standard">
      <style:page-layout-properties fo:page-width="21cm" fo:page-height="29.7cm" fo:margin-top="2.5cm" fo:margin-bottom="2.5cm" fo:margin-left="2.5cm" fo:margin-right="2.5cm" style:writing-mode="lr-tb"/>
    </style:page-layout>
  </office:automatic-styles>
  <office:master-styles>
    <style:master-page style:name="Standard" style:page-layout-name="Standard" style:display-name="Standard"/>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svg="urn:oasis:names:tc:opendocument:xmlns:svg-compatib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2</meta:generator>
  </office:meta>
</office:document-meta>
</file>