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Erbscheinantrag ($ 2353 BGB, $$ 352 ff. FamFG)</text:h>
      <text:p text:style-name="Center">An das Amtsgericht [Ort] — Nachlassgericht —</text:p>
      <text:p text:style-name="Center">[Anschrift]</text:p>
      <text:p text:style-name="Default"/>
      <text:p text:style-name="Default">Nachlasssache [Verstorbener Vorname Nachname], verstorben am [Sterbedatum] in [Sterbeort]</text:p>
      <text:p text:style-name="Default">Az. [Nachlassgericht-Az., wenn schon eroeffnet]</text:p>
      <text:p text:style-name="CenterBold">Antrag auf Erteilung eines Erbscheins</text:p>
      <text:p text:style-name="Default">Namens und in Vollmacht von [Antragsteller], geboren [Datum], wohnhaft [Anschrift], beantragen wir die Erteilung eines Erbscheins, der den Antragsteller als [Allein-Erben / Mit-Erben zu [Bruchteil]] des am [Sterbedatum] verstorbenen [Erblasser Name] ausweist.</text:p>
      <text:h text:style-name="H2" text:outline-level="2">1. Erblasser</text:h>
      <text:p text:style-name="Default">Name: [Erblasser]</text:p>
      <text:p text:style-name="Default">Geboren: [Datum, Ort]</text:p>
      <text:p text:style-name="Default">Gestorben: [Datum, Ort]</text:p>
      <text:p text:style-name="Default">Letzter gewoehnlicher Aufenthalt: [Ort]</text:p>
      <text:p text:style-name="Default">Familienstand bei Tod: [verheiratet/verwitwet/geschieden/ledig]</text:p>
      <text:h text:style-name="H2" text:outline-level="2">2. Berufungsgrund</text:h>
      <text:p text:style-name="Default">[Option A — Gesetzliche Erbfolge:] Die Berufung des Antragstellers folgt aus gesetzlicher Erbfolge. Verwandtschaftsgrad: [Kind / Ehegatten / sonstige]. Erbquote: [Anteil] (BGB $$ 1924 ff., bei Ehegatten zusaetzlich $ 1371 BGB Zugewinngemeinschaft).</text:p>
      <text:p text:style-name="Default">[Option B — Testamentarische Erbfolge:] Die Berufung folgt aus dem Testament des Erblassers vom [Datum]; dieses ist als Anlage A1 beigefuegt. Das Testament wurde am [Datum] vom Nachlassgericht eroeffnet ($ 348 FamFG).</text:p>
      <text:p text:style-name="Default">[Option C — Erbvertrag:] Die Berufung folgt aus dem Erbvertrag vom [Datum] (notariell beurkundet, UR-Nr. [Nr.], Notar [Name]).</text:p>
      <text:h text:style-name="H2" text:outline-level="2">3. Andere Erben / Pflichtteilsberechtigte</text:h>
      <text:p text:style-name="Default">[Liste aller bekannten weiteren gesetzlichen Erben / Pflichtteilsberechtigten mit Anschriften zur Anhoerung nach $ 352a FamFG.]</text:p>
      <text:h text:style-name="H2" text:outline-level="2">4. Nachlassumfang (vorlaeufig)</text:h>
      <text:p text:style-name="Default">Aktiva (geschaetzt): [Betrag] EUR — bestehend aus [Immobilien, Konten, Wertpapieren etc.]</text:p>
      <text:p text:style-name="Default">Passiva (geschaetzt): [Betrag] EUR</text:p>
      <text:p text:style-name="Default">Der Wert ist erforderlich zur Bemessung des Geschaeftswerts ($ 40 GNotKG).</text:p>
      <text:h text:style-name="H2" text:outline-level="2">5. Eidesstattliche Versicherung</text:h>
      <text:p text:style-name="Default">Die Vorlage einer eidesstattlichen Versicherung gemaess $ 352 FamFG wird angekuendigt; sie wird im Anhoerungstermin abgegeben.</text:p>
      <text:h text:style-name="H2" text:outline-level="2">Anlagen</text:h>
      <text:p text:style-name="Default">- A1: Sterbeurkunde</text:p>
      <text:p text:style-name="Default">- A2: Testament / Erbvertrag (bei Vorhandensein)</text:p>
      <text:p text:style-name="Default">- A3: Geburtsurkunden der Erben</text:p>
      <text:p text:style-name="Default">- A4: Heiratsurkunde Erblasser (sofern verheiratet)</text:p>
      <text:p text:style-name="Default">- A5: Familienstammbuch / Personenstandsregister</text:p>
      <text:p text:style-name="Default">- A6: Verzicht-/Ausschlagungserklaerungen Dritter (sofern relevant)</text:p>
      <text:p text:style-name="Default">[Ort], [Datum]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Erblasser]</text:p>
      <text:p text:style-name="Default">• [Sterbedatum + -ort]</text:p>
      <text:p text:style-name="Default">• [Antragsteller + Geburtsdatum + Anschrift]</text:p>
      <text:p text:style-name="Default">• [Berufungsgrund]</text:p>
      <text:p text:style-name="Default">• [Nachlasswert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