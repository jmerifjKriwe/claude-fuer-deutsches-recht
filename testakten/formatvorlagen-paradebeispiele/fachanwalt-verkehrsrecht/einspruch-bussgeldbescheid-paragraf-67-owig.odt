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Einspruch gegen Bussgeldbescheid ($ 67 OWiG)</text:h>
      <text:p text:style-name="Center">An die Bussgeldstelle [Behoerde] / das Amtsgericht [Ort]</text:p>
      <text:p text:style-name="Center">[Anschrift]</text:p>
      <text:p text:style-name="Default"/>
      <text:p text:style-name="Default">Az. [Az. der Bussgeldstelle]</text:p>
      <text:p text:style-name="Default">Bussgeldbescheid vom [Datum], zugegangen am [Zugangsdatum]</text:p>
      <text:p text:style-name="Default"/>
      <text:p text:style-name="CenterBold">Einspruch</text:p>
      <text:p text:style-name="Default">Namens und in Vollmacht des Betroffenen</text:p>
      <text:p text:style-name="Default"/>
      <text:p text:style-name="Default">[Vorname Nachname], geboren [Datum], [Anschrift]</text:p>
      <text:p text:style-name="Default"/>
      <text:p text:style-name="Default">lege ich gegen den genannten Bussgeldbescheid hiermit form- und fristgerecht</text:p>
      <text:p text:style-name="Default">EINSPRUCH</text:p>
      <text:p text:style-name="Default">ein ($ 67 OWiG).</text:p>
      <text:h text:style-name="H2" text:outline-level="2">Antrag</text:h>
      <text:p text:style-name="Default">1. Der Bussgeldbescheid vom [Datum] wird aufgehoben.</text:p>
      <text:p text:style-name="Default">2. Hilfsweise: Die Geldbusse wird auf das schuldangemessene Mass reduziert; das Fahrverbot entfaellt.</text:p>
      <text:p text:style-name="Default">3. Akteneinsicht wird beantragt ($ 49 OWiG i. V. m. $ 147 StPO; insbesondere Einsicht in die Rohmessdaten — BVerfG 12.11.2020, 2 BvR 1616/18, live verifizieren).</text:p>
      <text:h text:style-name="H2" text:outline-level="2">Begruendung</text:h>
      <text:p text:style-name="Default">Der Vorwurf [Verstoss, z. B. Geschwindigkeitsueberschreitung um X km/h] wird in tatsaechlicher und rechtlicher Hinsicht bestritten.</text:p>
      <text:p text:style-name="Default">[Wenn Messverfahren betroffen: Zweifel an Eichgueltigkeit, Toleranzabzug, Bauartzulassung, Anlageprotokoll, Messprotokoll, Lichtbildqualitaet. Bei standardisiertem Messverfahren: BGH 4 StR 24/97 v. 30.10.1997, live verifizieren.]</text:p>
      <text:p text:style-name="Default">[Wenn Fahrerermittlung streitig: Identitaet des Fahrers bestritten; Hinweis auf $ 13 StVZO.]</text:p>
      <text:p text:style-name="Default">[Wenn Fahrverbot droht: Beruflicher Nachteil substantiiert (Schonfrist $ 25 Abs. 2a StVG).]</text:p>
      <text:p text:style-name="Default">[Ort], [Datum]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Betroffener Name + Geburtsdatum + Anschrift]</text:p>
      <text:p text:style-name="Default">• [Az. Bussgeldbescheid]</text:p>
      <text:p text:style-name="Default">• [Datum Bescheid]</text:p>
      <text:p text:style-name="Default">• [Zugangsdatum]</text:p>
      <text:p text:style-name="Default">• [Verstos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