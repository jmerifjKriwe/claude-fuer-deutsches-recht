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Scheidungsantrag ($ 133 FamFG, $$ 1564 ff. BGB)</text:h>
      <text:p text:style-name="Center">An das Amtsgericht — Familiengericht — [Ort]</text:p>
      <text:p text:style-name="Center">[Anschrift]</text:p>
      <text:p text:style-name="Default"/>
      <text:p text:style-name="CenterBold">Scheidungsantrag</text:p>
      <text:p text:style-name="Default"/>
      <text:p text:style-name="Default">der [Vorname Nachname], geboren am [Datum], wohnhaft [Anschrift]</text:p>
      <text:p text:style-name="Default">— Antragstellerin —</text:p>
      <text:p text:style-name="Default">vertreten durch [Anwalt/Anwaeltin], [Kanzlei]</text:p>
      <text:p text:style-name="Default"/>
      <text:p text:style-name="Default">gegen</text:p>
      <text:p text:style-name="Default">[Vorname Nachname Antragsgegner], geboren [Datum], wohnhaft [Anschrift]</text:p>
      <text:p text:style-name="Default">— Antragsgegner —</text:p>
      <text:h text:style-name="H2" text:outline-level="2">Antraege</text:h>
      <text:p text:style-name="Default">1. Die am [Eheschliessungsdatum] vor dem Standesamt [Ort], Reg.-Nr. [Nr.], geschlossene Ehe wird geschieden ($ 1564 BGB).</text:p>
      <text:p text:style-name="Default">2. Im Verbund wird der Versorgungsausgleich durchgefuehrt ($ 137 II 2 FamFG i. V. m. VersAusglG).</text:p>
      <text:p text:style-name="Default">3. [Optional: weitere Verbundsachen — Unterhalt, Zugewinn, elterliche Sorge, Hausrat]</text:p>
      <text:p text:style-name="Default">4. Die Antragstellerin wird von den Verfahrenskosten freigestellt; hilfsweise wird Verfahrenskostenhilfe beantragt.</text:p>
      <text:h text:style-name="H2" text:outline-level="2">Sachverhalt</text:h>
      <text:p text:style-name="Default">Die Parteien sind seit dem [Eheschliessungsdatum] verheiratet. Kinder aus der Ehe: [Anzahl, Namen, Geburtsdaten — wenn keine: "Aus der Ehe sind keine gemeinsamen Kinder hervorgegangen."].</text:p>
      <text:p text:style-name="Default">Die Parteien leben seit dem [Trennungsdatum] dauernd getrennt; das Trennungsjahr ist abgelaufen ($ 1567 BGB). Eine Wiederherstellung der ehelichen Lebensgemeinschaft ist nicht zu erwarten; die Ehe ist gescheitert ($ 1565 I BGB).</text:p>
      <text:p text:style-name="Default">Die Antragstellerin und der Antragsgegner sind sich [einig / nicht einig] hinsichtlich der Scheidung. [Wenn einvernehmlich: Antragsgegner stimmt nach $ 1566 I BGB zu.]</text:p>
      <text:h text:style-name="H2" text:outline-level="2">Belege</text:h>
      <text:p text:style-name="Default">- Anlage A1: Heiratsurkunde Standesamt [Ort]</text:p>
      <text:p text:style-name="Default">- Anlage A2: Geburtsurkunden der Kinder (sofern vorhanden)</text:p>
      <text:p text:style-name="Default">- Anlage A3: Erklaerung Antragsgegner zur Scheidung (sofern liegt vor)</text:p>
      <text:p text:style-name="Default">- Anlage A4: Auskunfts-Fragebogen Versorgungsausgleich (V10)</text:p>
      <text:p text:style-name="Default">[Ort], den [Datum]</text:p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Antragstellerin Name, Geburtsdatum, Anschrift]</text:p>
      <text:p text:style-name="Default">• [Antragsgegner Name, Geburtsdatum, Anschrift]</text:p>
      <text:p text:style-name="Default">• [Eheschliessungsdatum]</text:p>
      <text:p text:style-name="Default">• [Standesamt + Reg.-Nr.]</text:p>
      <text:p text:style-name="Default">• [Trennungsdatum]</text:p>
      <text:p text:style-name="Default">• [Kinder Namen + Geburtsdaten]</text:p>
      <text:p text:style-name="Default">• [Familiengerichts-Or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