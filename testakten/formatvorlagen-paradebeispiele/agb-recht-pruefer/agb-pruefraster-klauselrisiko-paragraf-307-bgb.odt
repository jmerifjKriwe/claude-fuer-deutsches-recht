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</office:automatic-styles>
  <office:body>
    <office:text>
      <text:p text:style-name="Disclaimer">Achtung: Dies ist eine experimentelle Arbeitsvorlage. Keine Haftung, keine Gewähr. Nur zum Ausprobieren der Workflows; keine Rechtsberatung. Vor jeder Verwendung im Mandat anwaltlich prüfen.</text:p>
      <text:p text:style-name="Default"/>
      <text:h text:style-name="H1" text:outline-level="1">AGB-Pruefraster nach $$ 305-310 BGB (B2B / B2C)</text:h>
      <text:p text:style-name="Default">*Diese Vorlage liefert ein strukturiertes Pruefraster fuer Allgemeine Geschaeftsbedingungen — fuer juristische Sichtkontrolle und Erstdraft. Felder in [Klammern] vor Verwendung ausfuellen.*</text:p>
      <text:h text:style-name="H2" text:outline-level="2">Mandant / Sachverhalt</text:h>
      <text:p text:style-name="Default">Mandant: [Name + Funktion: Verwender / Klauselgegner]</text:p>
      <text:p text:style-name="Default">Vertragstyp: [Kaufvertrag, Dienstvertrag, Werkvertrag, Lizenz, etc.]</text:p>
      <text:p text:style-name="Default">Adressat der AGB: [B2B / B2C / Mischklientel]</text:p>
      <text:p text:style-name="Default">Anwendungsbereich: [Branche, Region]</text:p>
      <text:h text:style-name="H2" text:outline-level="2">1. Einbeziehung ($ 305 II BGB)</text:h>
      <text:p text:style-name="Default">- [ ] Ausdruecklicher Hinweis bei Vertragsschluss erkennbar</text:p>
      <text:p text:style-name="Default">- [ ] Zumutbare Kenntnisnahme moeglich (lesbar, abrufbar)</text:p>
      <text:p text:style-name="Default">- [ ] Einverstaendnis konkludent moeglich</text:p>
      <text:p text:style-name="Default">- [ ] B2B: Hinweispflichten reduziert ($ 310 I BGB)</text:p>
      <text:p text:style-name="Default">- [ ] Online-AGB: Click-Wrap dokumentiert; Speicherbarkeit gegeben</text:p>
      <text:h text:style-name="H2" text:outline-level="2">2. Vorrang Individualabrede ($ 305b BGB)</text:h>
      <text:p text:style-name="Default">- [ ] Konkurrierende Individualabreden geprueft</text:p>
      <text:p text:style-name="Default">- [ ] Bei Widerspruch: Individualabrede setzt sich durch</text:p>
      <text:h text:style-name="H2" text:outline-level="2">3. Inhaltskontrolle Stufe 1 — Verbotskataloge</text:h>
      <text:p text:style-name="Default">- [ ] $ 309 BGB (Klauselverbote ohne Wertung) ueberprueft — gilt bei B2C-AGB direkt; bei B2B Indizwirkung</text:p>
      <text:p text:style-name="Default">- [ ] $ 308 BGB (Klauselverbote mit Wertungsmoeglichkeit)</text:p>
      <text:h text:style-name="H2" text:outline-level="2">4. Inhaltskontrolle Stufe 2 — Generalklausel $ 307 BGB</text:h>
      <text:p text:style-name="Default">- [ ] Unangemessene Benachteiligung gegen Treu und Glauben? ($ 307 I S. 1 BGB)</text:p>
      <text:p text:style-name="Default">- [ ] Transparenzgebot: $ 307 I S. 2 BGB — Klausel klar und verstaendlich?</text:p>
      <text:p text:style-name="Default">- [ ] Abweichung vom wesentlichen Grundgedanken einer gesetzlichen Regelung? ($ 307 II Nr. 1 BGB)</text:p>
      <text:p text:style-name="Default">- [ ] Beschraenkung wesentlicher Rechte/Pflichten? ($ 307 II Nr. 2 BGB — Kardinalpflichten)</text:p>
      <text:h text:style-name="H2" text:outline-level="2">5. Risikoampel (Standard-Klausel-Typen)</text:h>
      <text:p text:style-name="Default">Haftungsbeschraenkung: [ROT bei vollstaendigem Ausschluss / GRUEN bei Kardinalpflicht-Haftung erhalten]</text:p>
      <text:p text:style-name="Default">Verguetungsanpassung: [ROT bei einseitig + ohne Anlass / GRUEN bei Index gebunden]</text:p>
      <text:p text:style-name="Default">Aufrechnungsverbot B2C: [ROT generell / GRUEN bei unstreitig / rechtskraeftig]</text:p>
      <text:p text:style-name="Default">Vertragsstrafe B2C: [ROT generell unzulaessig / B2B Indizwirkung von $ 309 Nr. 6 BGB]</text:p>
      <text:p text:style-name="Default">Schriftformklausel: [Vorsicht: doppelte Schriftform meist unwirksam, BGH-Linie]</text:p>
      <text:p text:style-name="Default">Aenderungsvorbehalt: [ROT bei einseitig ohne Triftgrund / GRUEN bei zumutbaren Anpassungsgruenden]</text:p>
      <text:h text:style-name="H2" text:outline-level="2">6. Rechtsfolge bei Unwirksamkeit</text:h>
      <text:p text:style-name="Default">$ 306 BGB: nicht-Einbeziehung; Vertrag im Uebrigen wirksam; Rueckfall auf gesetzliche Regelung. Keine geltungserhaltende Reduktion (BGH st. Rspr.).</text:p>
      <text:h text:style-name="H2" text:outline-level="2">7. UKlaG-Risiko</text:h>
      <text:p text:style-name="Default">Bei B2C-AGB: Verbandsklage-Risiko durch Verbraucherzentralen ($$ 1 ff. UKlaG); ggf. Unterlassungspflicht + Vertragsstrafenvereinbarung mit Verband.</text:p>
      <text:h text:style-name="H2" text:outline-level="2">Ergebnis und Empfehlung</text:h>
      <text:p text:style-name="Default">Gesamteinschaetzung: [GRUEN / ORANGE / ROT]</text:p>
      <text:p text:style-name="Default">Konkrete Aenderungsempfehlungen: [Liste]</text:p>
      <text:p text:style-name="Default">Reststreit-Punkte: [Liste]</text:p>
      <text:p text:style-name="Default">Risiko UKlaG: [hoch/mittel/niedrig]</text:p>
      <text:p text:style-name="Default"/>
      <text:h text:style-name="H3" text:outline-level="3">Felder im Template</text:h>
      <text:p text:style-name="Default">• [Mandant + Funktion]</text:p>
      <text:p text:style-name="Default">• [Vertragstyp]</text:p>
      <text:p text:style-name="Default">• [B2C/B2B-Status]</text:p>
      <text:p text:style-name="Default">• [Branche]</text:p>
      <text:p text:style-name="Default">• [Konkrete Klauseltexte einsetzen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