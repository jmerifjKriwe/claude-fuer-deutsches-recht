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automatic-styles>
    <style:style style:name="Disclaimer" style:family="paragraph" style:parent-style-name="Default" style:display-name="Disclaimer">
      <style:text-properties style:font-name="Times New Roman" fo:font-size="10pt" fo:font-style="italic" fo:color="#444444"/>
      <style:paragraph-properties fo:text-align="justify" fo:margin-bottom="0.4cm"/>
    </style:style>
    <style:style style:name="H1" style:family="paragraph" style:parent-style-name="Default" style:display-name="H1">
      <style:text-properties style:font-name="Times New Roman" fo:font-size="16pt" fo:font-weight="bold"/>
      <style:paragraph-properties fo:text-align="left" fo:margin-top="0.4cm" fo:margin-bottom="0.2cm"/>
    </style:style>
    <style:style style:name="H2" style:family="paragraph" style:parent-style-name="Default" style:display-name="H2">
      <style:text-properties style:font-name="Times New Roman" fo:font-size="13pt" fo:font-weight="bold"/>
      <style:paragraph-properties fo:text-align="left" fo:margin-top="0.4cm" fo:margin-bottom="0.2cm"/>
    </style:style>
    <style:style style:name="H3" style:family="paragraph" style:parent-style-name="Default" style:display-name="H3">
      <style:text-properties style:font-name="Times New Roman" fo:font-size="11.5pt" fo:font-weight="bold"/>
      <style:paragraph-properties fo:text-align="left" fo:margin-top="0.4cm" fo:margin-bottom="0.2cm"/>
    </style:style>
    <style:style style:name="CenterBold" style:family="paragraph" style:parent-style-name="Default" style:display-name="CenterBold">
      <style:text-properties style:font-name="Times New Roman" fo:font-size="12pt" fo:font-weight="bold"/>
      <style:paragraph-properties fo:text-align="center" fo:margin-bottom="0.2cm"/>
    </style:style>
  </office:automatic-styles>
  <office:body>
    <office:text>
      <text:p text:style-name="Disclaimer">Achtung: Dies ist eine experimentelle Arbeitsvorlage. Keine Haftung, keine Gewähr. Nur zum Ausprobieren der Workflows; keine Rechtsberatung. Vor jeder Verwendung im Mandat anwaltlich prüfen.</text:p>
      <text:p text:style-name="Disclaimer">Caution: This is an experimental working template. No liability, no warranty. For workflow exploration only; not legal advice. Must be reviewed by a lawyer before any use in a mandate.</text:p>
      <text:p text:style-name="Default"/>
      <text:h text:style-name="H1" text:outline-level="1">Patent-Lizenzvertrag (Kurzform, bilingual DE/EN)</text:h>
      <text:p text:style-name="CenterBold">PATENT-LIZENZVERTRAG / PATENT LICENCE AGREEMENT</text:p>
      <text:p text:style-name="Default"/>
      <text:p text:style-name="Default">zwischen / between</text:p>
      <text:p text:style-name="Default">[Lizenzgeber-Firma] ("Lizenzgeber" / "Licensor"), [Anschrift]</text:p>
      <text:p text:style-name="Default">und / and</text:p>
      <text:p text:style-name="Default">[Lizenznehmer-Firma] ("Lizenznehmer" / "Licensee"), [Anschrift]</text:p>
      <text:h text:style-name="H2" text:outline-level="2">$ 1 Lizenzgegenstand / Licensed IP</text:h>
      <text:p text:style-name="Default">(DE) Der Lizenzgeber raeumt dem Lizenznehmer eine [einfache / ausschliessliche] Lizenz an dem in Anlage A bezeichneten Patent [Reg.-Nr.] ("Lizenzpatent") fuer das Anwendungsfeld [Feld] im Territorium [Gebiet] ein.</text:p>
      <text:p text:style-name="Default">(EN) Licensor hereby grants Licensee a [non-exclusive / exclusive] licence under the patent listed in Annex A (Reg. no. [Reg.-No.]) (the "Licensed Patent") for the field of use of [Field] in the territory of [Territory].</text:p>
      <text:h text:style-name="H2" text:outline-level="2">$ 2 Verguetung / Royalties</text:h>
      <text:p text:style-name="Default">(DE) Der Lizenznehmer zahlt eine Running Royalty in Hoehe von [X] % des Nettoumsatzes mit Lizenzprodukten, abzurechnen kalenderquartalsweise.</text:p>
      <text:p text:style-name="Default">(EN) Licensee shall pay a running royalty of [X] % of Net Sales of Licensed Products, payable quarterly.</text:p>
      <text:h text:style-name="H2" text:outline-level="2">$ 3 Laufzeit / Term</text:h>
      <text:p text:style-name="Default">(DE) Der Vertrag laeuft fest bis zum Ablauf des Lizenzpatents; ausserordentliche Kuendigung aus wichtigem Grund moeglich.</text:p>
      <text:p text:style-name="Default">(EN) The Agreement runs until the expiration of the Licensed Patent; termination for cause is permitted.</text:p>
      <text:h text:style-name="H2" text:outline-level="2">$ 4 Vertraulichkeit / Confidentiality</text:h>
      <text:p text:style-name="Default">(DE) Die Parteien halten Geschaeftsgeheimnisse 5 Jahre ueber das Vertragsende hinaus vertraulich.</text:p>
      <text:p text:style-name="Default">(EN) The Parties shall keep trade secrets confidential for 5 years beyond termination.</text:p>
      <text:h text:style-name="H2" text:outline-level="2">$ 5 Rechtswahl und Gerichtsstand / Governing Law and Jurisdiction</text:h>
      <text:p text:style-name="Default">(DE) Dieser Vertrag unterliegt deutschem Recht unter Ausschluss des UN-Kaufrechts. Gerichtsstand ist [Ort].</text:p>
      <text:p text:style-name="Default">(EN) This Agreement shall be governed by the laws of the Federal Republic of Germany; the United Nations Convention on Contracts for the International Sale of Goods (CISG) shall not apply. Jurisdiction: [City].</text:p>
      <text:p text:style-name="Default">(DE) **Bei Divergenzen zwischen der deutschen und der englischen Fassung ist die deutsche Fassung massgebend.**</text:p>
      <text:p text:style-name="Default">(EN) **In case of any discrepancy between the German and the English version, the German version shall prevail.**</text:p>
      <text:p text:style-name="Default"/>
      <text:p text:style-name="Default">[Ort/Place], [Datum/Date]</text:p>
      <text:p text:style-name="Default">_______________________________   _______________________________</text:p>
      <text:p text:style-name="Default">Lizenzgeber / Licensor             Lizenznehmer / Licensee</text:p>
      <text:p text:style-name="Default"/>
      <text:h text:style-name="H3" text:outline-level="3">Felder im Template</text:h>
      <text:p text:style-name="Default">• [Lizenzgeber-Firma + Anschrift]</text:p>
      <text:p text:style-name="Default">• [Lizenznehmer-Firma + Anschrift]</text:p>
      <text:p text:style-name="Default">• [Patent Reg.-Nr.]</text:p>
      <text:p text:style-name="Default">• [Anwendungsfeld]</text:p>
      <text:p text:style-name="Default">• [Territorium]</text:p>
      <text:p text:style-name="Default">• [Royalty %]</text:p>
      <text:p text:style-name="Default">• [Gerichtsstand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Times New Roman" svg:font-family="Times New Roman" style:font-family-generic="roman" style:font-pitch="variable"/>
  </office:font-face-decls>
  <office:styles>
    <style:style style:name="Default" style:family="paragraph" style:display-name="Default">
      <style:text-properties style:font-name="Times New Roman" fo:font-size="11pt"/>
      <style:paragraph-properties fo:text-align="justify" fo:margin-bottom="0.2cm"/>
    </style:style>
  </office:styles>
  <office:automatic-styles>
    <style:page-layout style:name="Standard">
      <style:page-layout-properties fo:page-width="21cm" fo:page-height="29.7cm" fo:margin-top="2.5cm" fo:margin-bottom="2.5cm" fo:margin-left="2.5cm" fo:margin-right="2.5cm" style:writing-mode="lr-tb"/>
    </style:page-layout>
  </office:automatic-styles>
  <office:master-styles>
    <style:master-page style:name="Standard" style:page-layout-name="Standard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2</meta:generator>
  </office:meta>
</office:document-meta>
</file>