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isclaimer">Caution: This is an experimental AI-generated template. No liability, no warranty. For exploration of the skills and an AI only; not legal advice. Must be reviewed by a lawyer before any use in a mandate.</text:p>
      <text:p text:style-name="Default"/>
      <text:h text:style-name="H1" text:outline-level="1">Patent-Lizenzvertrag (Kurzform, bilingual DE/EN)</text:h>
      <text:p text:style-name="CenterBold">PATENT-LIZENZVERTRAG / PATENT LICENCE AGREEMENT</text:p>
      <text:p text:style-name="Default"/>
      <text:p text:style-name="Default">zwischen / between</text:p>
      <text:p text:style-name="Default">[Lizenzgeber-Firma] ("Lizenzgeber" / "Licensor"), [Anschrift]</text:p>
      <text:p text:style-name="Default">und / and</text:p>
      <text:p text:style-name="Default">[Lizenznehmer-Firma] ("Lizenznehmer" / "Licensee"), [Anschrift]</text:p>
      <text:h text:style-name="H2" text:outline-level="2">$ 1 Lizenzgegenstand / Licensed IP</text:h>
      <text:p text:style-name="Default">(DE) Der Lizenzgeber raeumt dem Lizenznehmer eine [einfache / ausschliessliche] Lizenz an dem in Anlage A bezeichneten Patent [Reg.-Nr.] ("Lizenzpatent") fuer das Anwendungsfeld [Feld] im Territorium [Gebiet] ein.</text:p>
      <text:p text:style-name="Default">(EN) Licensor hereby grants Licensee a [non-exclusive / exclusive] licence under the patent listed in Annex A (Reg. no. [Reg.-No.]) (the "Licensed Patent") for the field of use of [Field] in the territory of [Territory].</text:p>
      <text:h text:style-name="H2" text:outline-level="2">$ 2 Verguetung / Royalties</text:h>
      <text:p text:style-name="Default">(DE) Der Lizenznehmer zahlt eine Running Royalty in Hoehe von [X] % des Nettoumsatzes mit Lizenzprodukten, abzurechnen kalenderquartalsweise.</text:p>
      <text:p text:style-name="Default">(EN) Licensee shall pay a running royalty of [X] % of Net Sales of Licensed Products, payable quarterly.</text:p>
      <text:h text:style-name="H2" text:outline-level="2">$ 3 Laufzeit / Term</text:h>
      <text:p text:style-name="Default">(DE) Der Vertrag laeuft fest bis zum Ablauf des Lizenzpatents; ausserordentliche Kuendigung aus wichtigem Grund moeglich.</text:p>
      <text:p text:style-name="Default">(EN) The Agreement runs until the expiration of the Licensed Patent; termination for cause is permitted.</text:p>
      <text:h text:style-name="H2" text:outline-level="2">$ 4 Vertraulichkeit / Confidentiality</text:h>
      <text:p text:style-name="Default">(DE) Die Parteien halten Geschaeftsgeheimnisse 5 Jahre ueber das Vertragsende hinaus vertraulich.</text:p>
      <text:p text:style-name="Default">(EN) The Parties shall keep trade secrets confidential for 5 years beyond termination.</text:p>
      <text:h text:style-name="H2" text:outline-level="2">$ 5 Rechtswahl und Gerichtsstand / Governing Law and Jurisdiction</text:h>
      <text:p text:style-name="Default">(DE) Dieser Vertrag unterliegt deutschem Recht unter Ausschluss des UN-Kaufrechts. Gerichtsstand ist [Ort].</text:p>
      <text:p text:style-name="Default">(EN) This Agreement shall be governed by the laws of the Federal Republic of Germany; the United Nations Convention on Contracts for the International Sale of Goods (CISG) shall not apply. Jurisdiction: [City].</text:p>
      <text:p text:style-name="Default">(DE) **Bei Divergenzen zwischen der deutschen und der englischen Fassung ist die deutsche Fassung massgebend.**</text:p>
      <text:p text:style-name="Default">(EN) **In case of any discrepancy between the German and the English version, the German version shall prevail.**</text:p>
      <text:p text:style-name="Default"/>
      <text:p text:style-name="Default">[Ort/Place], [Datum/Date]</text:p>
      <text:p text:style-name="Default">_______________________________   _______________________________</text:p>
      <text:p text:style-name="Default">Lizenzgeber / Licensor             Lizenznehmer / Licensee</text:p>
      <text:p text:style-name="Default"/>
      <text:h text:style-name="H3" text:outline-level="3">Felder im Template</text:h>
      <text:p text:style-name="Default">• [Lizenzgeber-Firma + Anschrift]</text:p>
      <text:p text:style-name="Default">• [Lizenznehmer-Firma + Anschrift]</text:p>
      <text:p text:style-name="Default">• [Patent Reg.-Nr.]</text:p>
      <text:p text:style-name="Default">• [Anwendungsfeld]</text:p>
      <text:p text:style-name="Default">• [Territorium]</text:p>
      <text:p text:style-name="Default">• [Royalty %]</text:p>
      <text:p text:style-name="Default">• [Gerichtssta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