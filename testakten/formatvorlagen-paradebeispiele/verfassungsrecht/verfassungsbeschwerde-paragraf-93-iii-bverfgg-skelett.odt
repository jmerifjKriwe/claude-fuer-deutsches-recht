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automatic-styles>
    <style:style style:name="Disclaimer" style:family="paragraph" style:parent-style-name="Default" style:display-name="Disclaimer">
      <style:text-properties style:font-name="Times New Roman" fo:font-size="10pt" fo:font-style="italic" fo:color="#444444"/>
      <style:paragraph-properties fo:text-align="justify" fo:margin-bottom="0.4cm"/>
    </style:style>
    <style:style style:name="H1" style:family="paragraph" style:parent-style-name="Default" style:display-name="H1">
      <style:text-properties style:font-name="Times New Roman" fo:font-size="16pt" fo:font-weight="bold"/>
      <style:paragraph-properties fo:text-align="left" fo:margin-top="0.4cm" fo:margin-bottom="0.2cm"/>
    </style:style>
    <style:style style:name="H2" style:family="paragraph" style:parent-style-name="Default" style:display-name="H2">
      <style:text-properties style:font-name="Times New Roman" fo:font-size="13pt" fo:font-weight="bold"/>
      <style:paragraph-properties fo:text-align="left" fo:margin-top="0.4cm" fo:margin-bottom="0.2cm"/>
    </style:style>
    <style:style style:name="H3" style:family="paragraph" style:parent-style-name="Default" style:display-name="H3">
      <style:text-properties style:font-name="Times New Roman" fo:font-size="11.5pt" fo:font-weight="bold"/>
      <style:paragraph-properties fo:text-align="left" fo:margin-top="0.4cm" fo:margin-bottom="0.2cm"/>
    </style:style>
    <style:style style:name="CenterBold" style:family="paragraph" style:parent-style-name="Default" style:display-name="CenterBold">
      <style:text-properties style:font-name="Times New Roman" fo:font-size="12pt" fo:font-weight="bold"/>
      <style:paragraph-properties fo:text-align="center" fo:margin-bottom="0.2cm"/>
    </style:style>
    <style:style style:name="Center" style:family="paragraph" style:parent-style-name="Default" style:display-name="Center">
      <style:text-properties style:font-name="Times New Roman" fo:font-size="11pt"/>
      <style:paragraph-properties fo:text-align="center" fo:margin-bottom="0.2cm"/>
    </style:style>
  </office:automatic-styles>
  <office:body>
    <office:text>
      <text:p text:style-name="Disclaimer">Achtung: Dies ist eine experimentelle Arbeitsvorlage. Keine Haftung, keine Gewähr. Nur zum Ausprobieren der Workflows; keine Rechtsberatung. Vor jeder Verwendung im Mandat anwaltlich prüfen.</text:p>
      <text:p text:style-name="Default"/>
      <text:h text:style-name="H1" text:outline-level="1">Verfassungsbeschwerde-Skelett ($ 90 i.V.m. $ 93 III BVerfGG)</text:h>
      <text:p text:style-name="Center">An das Bundesverfassungsgericht</text:p>
      <text:p text:style-name="Center">Postfach 1771, 76131 Karlsruhe</text:p>
      <text:p text:style-name="CenterBold">Verfassungsbeschwerde</text:p>
      <text:p text:style-name="Default"/>
      <text:p text:style-name="Default">des/der</text:p>
      <text:p text:style-name="Default">[Beschwerdefuehrer Name, geboren (Datum), Anschrift]</text:p>
      <text:p text:style-name="Default">vertreten durch [Anwalt]</text:p>
      <text:p text:style-name="Default"/>
      <text:p text:style-name="Default">wegen Verletzung der Grundrechte aus Art. [Art.-Nr.] GG ggf. iVm Art. 19 IV GG</text:p>
      <text:p text:style-name="Default"/>
      <text:p text:style-name="Default">gegen [letzte Entscheidung — Datum, Az., Gericht — und alle vorhergehenden]</text:p>
      <text:h text:style-name="H2" text:outline-level="2">I. Antraege</text:h>
      <text:p text:style-name="Default">1. Das Urteil/den Beschluss [Az.] wird aufgehoben; die Sache wird zur erneuten Entscheidung an das [Gericht] zurueckverwiesen.</text:p>
      <text:p text:style-name="Default">2. Es wird festgestellt, dass [Norm/Akt der oeffentlichen Gewalt] den Beschwerdefuehrer in seinen Grundrechten aus Art. [Nr.] GG verletzt.</text:p>
      <text:p text:style-name="Default">3. Hilfsantraege ggf.</text:p>
      <text:p text:style-name="Default">4. Auslagenerstattung nach $ 34a BVerfGG.</text:p>
      <text:h text:style-name="H2" text:outline-level="2">II. Zulaessigkeit</text:h>
      <text:p text:style-name="Default">1. Beschwerdefaehigkeit: [Persoenliche Grundrechtstraegerschaft, ggf. inlaendische jur. Person]</text:p>
      <text:p text:style-name="Default">2. Beschwerdegegenstand: [konkreter Akt der oeffentl. Gewalt]</text:p>
      <text:p text:style-name="Default">3. Beschwerdebefugnis: [eigene, gegenwaertige, unmittelbare Betroffenheit; substantiierte Moeglichkeit der Grundrechtsverletzung]</text:p>
      <text:p text:style-name="Default">4. Rechtswegerschoepfung $ 90 II 1 BVerfGG: [Instanzenzug erschoepft] / Subsidiaritaet</text:p>
      <text:p text:style-name="Default">5. Frist $ 93 I BVerfGG: 1 Monat ab Zustellung der letzten Entscheidung</text:p>
      <text:p text:style-name="Default">6. Form $ 23 BVerfGG: Schriftform, Begruendung, Unterschrift</text:p>
      <text:h text:style-name="H2" text:outline-level="2">III. Begruendetheit — Aufbau Stufenpruefung</text:h>
      <text:p text:style-name="Default">1. **Schutzbereich** des einschlaegigen Grundrechts (persoenlich + sachlich)</text:p>
      <text:p text:style-name="Default">2. **Eingriff** (klassisch + modern)</text:p>
      <text:p text:style-name="Default">3. **Rechtfertigung** — Schranke + Schranken-Schranken (Verhaeltnismaessigkeit):</text:p>
      <text:p text:style-name="Default">   a) legitimer Zweck</text:p>
      <text:p text:style-name="Default">   b) Geeignetheit</text:p>
      <text:p text:style-name="Default">   c) Erforderlichkeit</text:p>
      <text:p text:style-name="Default">   d) Angemessenheit (Abwaegung mit triadischer Skala nach Alexy — siehe Skill abwaegungsgesetz-und-gewichtsformel-alexy im Verhaeltnismaessigkeitspruefer-Plugin)</text:p>
      <text:p text:style-name="Default">Verweis auf einschlaegige BVerfG-Linien (Apotheken BVerfGE 7, 377 / Volkszaehlung 65, 1 / Klimaschutz 157, 30 / Bundesnotbremse 159, 223 — live verifizieren).</text:p>
      <text:h text:style-name="H2" text:outline-level="2">IV. Anlagen</text:h>
      <text:p text:style-name="Default">VB1: letzte Entscheidung</text:p>
      <text:p text:style-name="Default">VB2: vorhergehende Entscheidungen</text:p>
      <text:p text:style-name="Default">VB3: Schriftsaetze des Beschwerdefuehrers im Verfahren</text:p>
      <text:p text:style-name="Default">VB4: Vollmacht</text:p>
      <text:p text:style-name="Default">VB5: einschlaegige Norm-Texte</text:p>
      <text:p text:style-name="Default"/>
      <text:p text:style-name="Default">[Ort], [Datum]</text:p>
      <text:p text:style-name="Default">_______________________________</text:p>
      <text:p text:style-name="Default">[Anwalt]</text:p>
      <text:p text:style-name="Default"/>
      <text:h text:style-name="H3" text:outline-level="3">Felder im Template</text:h>
      <text:p text:style-name="Default">• [Beschwerdefuehrer]</text:p>
      <text:p text:style-name="Default">• [einschlaegiges Grundrecht Art.]</text:p>
      <text:p text:style-name="Default">• [letztinstanzliche Entscheidung]</text:p>
      <text:p text:style-name="Default">• [Az.]</text:p>
      <text:p text:style-name="Default">• [Rechtsweg]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styles>
    <style:style style:name="Default" style:family="paragraph" style:display-name="Default">
      <style:text-properties style:font-name="Times New Roman" fo:font-size="11pt"/>
      <style:paragraph-properties fo:text-align="justify" fo:margin-bottom="0.2cm"/>
    </style:style>
  </office:styles>
  <office:automatic-styles>
    <style:page-layout style:name="Standard">
      <style:page-layout-properties fo:page-width="21cm" fo:page-height="29.7cm" fo:margin-top="2.5cm" fo:margin-bottom="2.5cm" fo:margin-left="2.5cm" fo:margin-right="2.5cm" style:writing-mode="lr-tb"/>
    </style:page-layout>
  </office:automatic-styles>
  <office:master-styles>
    <style:master-page style:name="Standard" style:page-layout-name="Standard" style:display-name="Standard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2</meta:generator>
  </office:meta>
</office:document-meta>
</file>