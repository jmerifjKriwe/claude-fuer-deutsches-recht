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KI-Vorlage. Keine Haftung, keine Gewaehr. Nur zum Ausprobieren der Skills und einer KI; keine Rechtsberatung. Vor jeder Verwendung im Mandat anwaltlich pruefen.</text:p>
      <text:p text:style-name="Default"/>
      <text:h text:style-name="H1" text:outline-level="1">Akteneinsichtsantrag ($ 147 StPO)</text:h>
      <text:p text:style-name="Center">An die Staatsanwaltschaft [Ort] / das Amts-/Landgericht [Ort]</text:p>
      <text:p text:style-name="Center">[Anschrift]</text:p>
      <text:p text:style-name="Default"/>
      <text:p text:style-name="CenterBold">Akteneinsichtsantrag</text:p>
      <text:p text:style-name="Default"/>
      <text:p text:style-name="Default">in dem Ermittlungs-/Strafverfahren</text:p>
      <text:p text:style-name="Default"/>
      <text:p text:style-name="Default">gegen [Beschuldigter Vorname Nachname], geboren [Datum], wohnhaft [Anschrift]</text:p>
      <text:p text:style-name="Default"/>
      <text:p text:style-name="Default">wegen [Vorwurf, z. B. Diebstahls $ 242 StGB, Az. [Az.]]</text:p>
      <text:p text:style-name="Default">Namens und in Vollmacht des Beschuldigten zeige ich die Verteidigung an und beantrage:</text:p>
      <text:h text:style-name="H2" text:outline-level="2">Antrag</text:h>
      <text:p text:style-name="Default">1. Akteneinsicht in die vollstaendige Verfahrensakte einschliesslich aller Beweismittelaktenstuecke, Asservate, Sonderbaende und Spurenakten zu gewaehren ($ 147 Abs. 1 StPO).</text:p>
      <text:p text:style-name="Default">2. Die Akten in unsere Kanzlei zu uebersenden / digitalen Aktenzugriff einzurichten ($ 32f StPO).</text:p>
      <text:p text:style-name="Default">3. Hilfsweise: Akteneinsicht in den Gerichtsraeumen zu ermoeglichen.</text:p>
      <text:h text:style-name="H2" text:outline-level="2">Begruendung</text:h>
      <text:p text:style-name="Default">Akteneinsicht ist Voraussetzung effektiver Verteidigung (Art. 6 Abs. 3 lit. b EMRK, $ 137 StPO, $ 147 StPO). Ohne Kenntnis des Akteninhalts ist eine sachgerechte Einlassung des Beschuldigten ausgeschlossen.</text:p>
      <text:p text:style-name="Default">Soweit auf die Aufrechterhaltung des Untersuchungserfolgs nach $ 147 Abs. 2 Satz 1 StPO Bezug genommen wird, ist gegenueber dem inhaftierten Beschuldigten gemaess $ 147 Abs. 2 Satz 2 StPO Akteneinsicht in haftrelevante Teile in jedem Fall zu gewaehren (BVerfG-Linie, live verifizieren auf bundesverfassungsgericht.de).</text:p>
      <text:p text:style-name="Default">[Wenn U-Haft: Hinweis auf $ 119 StPO und Verhaeltnismaessigkeit der Haftfortdauer.]</text:p>
      <text:p text:style-name="Default">Mit kollegialen Gruessen</text:p>
      <text:p text:style-name="Default"/>
      <text:p text:style-name="Default">_______________________________</text:p>
      <text:p text:style-name="Default">[Rechtsanwalt/Rechtsanwaeltin] — Verteidiger:in</text:p>
      <text:p text:style-name="Default"/>
      <text:h text:style-name="H3" text:outline-level="3">Felder im Template</text:h>
      <text:p text:style-name="Default">• [Beschuldigter Name]</text:p>
      <text:p text:style-name="Default">• [Geburtsdatum]</text:p>
      <text:p text:style-name="Default">• [Anschrift]</text:p>
      <text:p text:style-name="Default">• [Vorwurf + Az.]</text:p>
      <text:p text:style-name="Default">• [StA-/Gerichts-Ort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