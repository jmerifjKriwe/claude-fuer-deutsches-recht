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Deckungsklage Haftpflichtversicherung ($ 100 VVG)</text:h>
      <text:p text:style-name="Center">An das Landgericht [Sitz Versicherer]</text:p>
      <text:p text:style-name="Center">[Anschrift]</text:p>
      <text:p text:style-name="CenterBold">Klage</text:p>
      <text:p text:style-name="Default"/>
      <text:p text:style-name="Default">des [Klaeger Name], [Anschrift]</text:p>
      <text:p text:style-name="Default">— Klaeger —</text:p>
      <text:p text:style-name="Default">vertreten durch [Anwalt]</text:p>
      <text:p text:style-name="Default"/>
      <text:p text:style-name="Default">gegen</text:p>
      <text:p text:style-name="Default">die [Versicherer-Gesellschaft], vertreten durch den Vorstand [Name], [Anschrift]</text:p>
      <text:p text:style-name="Default">— Beklagte —</text:p>
      <text:p text:style-name="Default"/>
      <text:p text:style-name="Default">wegen Versicherungsleistung aus Haftpflichtversicherung</text:p>
      <text:p text:style-name="Default">Streitwert: [Betrag] EUR</text:p>
      <text:h text:style-name="H2" text:outline-level="2">Antraege</text:h>
      <text:p text:style-name="Default">1. Die Beklagte wird verurteilt, an den Klaeger [Betrag] EUR nebst Zinsen in Hoehe von 5 Prozentpunkten ueber dem Basiszinssatz seit [Verzugsdatum] zu zahlen.</text:p>
      <text:p text:style-name="Default">2. Es wird festgestellt, dass die Beklagte verpflichtet ist, den Klaeger von der gegen ihn vom [Geschaedigter Name] geltend gemachten Schadensersatzforderung aus dem Schadensereignis vom [Datum] freizustellen ($ 100 VVG).</text:p>
      <text:p text:style-name="Default">3. Die Beklagte traegt die Kosten des Rechtsstreits.</text:p>
      <text:h text:style-name="H2" text:outline-level="2">Sachverhalt</text:h>
      <text:p text:style-name="Default">Der Klaeger unterhaelt bei der Beklagten den Haftpflichtversicherungsvertrag Nr. [Pol.-Nr.] (Anlage K1).</text:p>
      <text:p text:style-name="Default">Am [Schadensdatum] ereignete sich folgender versicherter Schadensfall: [Schilderung].</text:p>
      <text:p text:style-name="Default">Mit Schreiben vom [Meldedatum] hat der Klaeger den Schadensfall der Beklagten gemeldet (Anlage K2).</text:p>
      <text:p text:style-name="Default">Die Beklagte hat die Deckung mit Schreiben vom [Ablehnungsdatum] abgelehnt (Anlage K3) mit folgender Begruendung: [Ablehnungsgrund, z. B. Obliegenheitsverletzung $ 28 VVG, Anzeigepflichtverletzung $ 19 VVG, Ausschluss].</text:p>
      <text:h text:style-name="H2" text:outline-level="2">Rechtliche Wuerdigung</text:h>
      <text:h text:style-name="H3" text:outline-level="3">1. Versicherungsfall liegt vor</text:h>
      <text:p text:style-name="Default">Der Anspruch ergibt sich aus dem Versicherungsvertrag i. V. m. $ 100 VVG. Der Versicherungsfall (Schadensereignis im Geltungsbereich der Police) ist eingetreten.</text:p>
      <text:h text:style-name="H3" text:outline-level="3">2. Keine Leistungsausschluesse</text:h>
      <text:p text:style-name="Default">[Wenn Obliegenheitsverletzung geruegt: Belehrungserfordernis $ 28 IV VVG; Kausalitaetsgegenbeweis; BGH IV. Zivilsenat-Linie, live verifizieren.]</text:p>
      <text:p text:style-name="Default">[Wenn Anzeigepflichtverletzung geruegt: Arglist $ 22 VVG; Belehrung $ 19 V VVG; BGH IV ZR 104/17 v. 04.04.2018, live verifizieren.]</text:p>
      <text:h text:style-name="H3" text:outline-level="3">3. Faelligkeit nach $ 14 VVG</text:h>
      <text:p text:style-name="Default">Mit Abschluss der zur Feststellung des Versicherungsfalls und des Leistungsumfangs erforderlichen Erhebungen ist die Leistung faellig geworden. Verzug ist mit Ablauf der mit Mahnschreiben vom [Datum] gesetzten Frist eingetreten.</text:p>
      <text:h text:style-name="H2" text:outline-level="2">Beweismittel</text:h>
      <text:p text:style-name="Default">Anlagen K1-K3, Zeugen [Namen, Adressen], Sachverstaendigengutachten ($ 287 ZPO), Parteivernehmung.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Klaeger Name + Anschrift]</text:p>
      <text:p text:style-name="Default">• [Versicherer]</text:p>
      <text:p text:style-name="Default">• [Sitz Versicherer]</text:p>
      <text:p text:style-name="Default">• [Pol.-Nr.]</text:p>
      <text:p text:style-name="Default">• [Schadensdatum]</text:p>
      <text:p text:style-name="Default">• [Geschaedigter]</text:p>
      <text:p text:style-name="Default">• [Schadensbetrag]</text:p>
      <text:p text:style-name="Default">• [Verzugsdatum]</text:p>
      <text:p text:style-name="Default">• [Ablehnungsdatum + -grund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