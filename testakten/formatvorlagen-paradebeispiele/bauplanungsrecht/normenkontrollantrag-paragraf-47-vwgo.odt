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Normenkontrollantrag gegen Bebauungsplan ($ 47 VwGO)</text:h>
      <text:p text:style-name="Center">An das Oberverwaltungsgericht [Land]</text:p>
      <text:p text:style-name="CenterBold">Normenkontrollantrag</text:p>
      <text:p text:style-name="Default"/>
      <text:p text:style-name="Default">der/des</text:p>
      <text:p text:style-name="Default">[Antragsteller Name + Anschrift]</text:p>
      <text:p text:style-name="Default">vertreten durch [Anwalt]</text:p>
      <text:p text:style-name="Default"/>
      <text:p text:style-name="Default">gegen die Stadt/Gemeinde [Ort], vertreten durch [Oberbuergermeister/Buergermeister]</text:p>
      <text:p text:style-name="Default"/>
      <text:p text:style-name="Default">wegen Bebauungsplan Nr. [Nr.] "[Bezeichnung]" der Stadt [Ort]</text:p>
      <text:h text:style-name="H2" text:outline-level="2">Antraege</text:h>
      <text:p text:style-name="Default">1. Der Bebauungsplan Nr. [Nr.] "[Bezeichnung]" der Stadt [Ort], beschlossen am [Datum] / bekannt gemacht am [Datum], wird fuer unwirksam erklaert.</text:p>
      <text:p text:style-name="Default">2. Hilfsweise: Es wird festgestellt, dass der Bebauungsplan unwirksam ist.</text:p>
      <text:p text:style-name="Default">3. Die Antragsgegnerin traegt die Kosten des Verfahrens.</text:p>
      <text:h text:style-name="H2" text:outline-level="2">1. Zulaessigkeit</text:h>
      <text:p text:style-name="Default">a) Statthaftigkeit $ 47 I Nr. 1 VwGO: Der Bebauungsplan ist eine Satzung, die nach $ 47 VwGO der Normenkontrolle unterliegt.</text:p>
      <text:p text:style-name="Default">b) Antragsbefugnis $ 47 II 1 VwGO: Der Antragsteller ist [Eigentuemer des Grundstuecks Flur (Nr.), Flurstueck (Nr.) im Plangebiet / Nachbar mit drohender Beeintraechtigung].</text:p>
      <text:p text:style-name="Default">c) Frist $ 47 II 1 VwGO: 1 Jahr ab Bekanntmachung; eingehalten ([Datum Bekanntmachung] bis [Datum Klageeinreichung]).</text:p>
      <text:p text:style-name="Default">d) Vorverfahren: nicht erforderlich.</text:p>
      <text:h text:style-name="H2" text:outline-level="2">2. Begruendetheit — Verstoesse</text:h>
      <text:h text:style-name="H3" text:outline-level="3">a) Verfahrensfehler</text:h>
      <text:p text:style-name="Default">- Versaeumte Buergerbeteiligung $ 3 BauGB</text:p>
      <text:p text:style-name="Default">- Verfahrensmaengel bei Auslegung $ 3 II BauGB (Fristen, Bekanntmachung, Auslegungsmodalitaeten)</text:p>
      <text:p text:style-name="Default">- Fehlende erneute Auslegung nach Aenderung im Verfahren $ 4a III 1 BauGB</text:p>
      <text:p text:style-name="Default">- Behoerdenbeteiligung $ 4 BauGB unzureichend</text:p>
      <text:h text:style-name="H3" text:outline-level="3">b) Abwaegungsfehler ($ 1 VII BauGB)</text:h>
      <text:p text:style-name="Default">- Ermittlungsdefizit: relevante Belange nicht ermittelt</text:p>
      <text:p text:style-name="Default">- Bewertungsdefizit: ermittelte Belange falsch bewertet</text:p>
      <text:p text:style-name="Default">- Abwaegungsdisproportionalitaet: Gewichte verkannt</text:p>
      <text:p text:style-name="Default">- Abwaegungsausfall: einzelne Belange uebersehen</text:p>
      <text:h text:style-name="H3" text:outline-level="3">c) Materielle Festsetzungsfehler</text:h>
      <text:p text:style-name="Default">- Festsetzungen ueber den $-9-Katalog hinaus / unzureichend bestimmt</text:p>
      <text:p text:style-name="Default">- Verstoss gegen Anpassungspflicht $ 1 IV BauGB (Ziele der Raumordnung)</text:p>
      <text:p text:style-name="Default">- Erforderlichkeit $ 1 III BauGB nicht gegeben</text:p>
      <text:h text:style-name="H3" text:outline-level="3">d) Sonstige Verstoesse</text:h>
      <text:p text:style-name="Default">- Naturschutzfachliche Pruefung $ 1a III BauGB / saP fehlerhaft</text:p>
      <text:p text:style-name="Default">- Schallschutzgutachten unvollstaendig</text:p>
      <text:p text:style-name="Default">- Bodenschutz-/Altlasten-Aspekte nicht ermittelt</text:p>
      <text:h text:style-name="H2" text:outline-level="2">3. Anlagen</text:h>
      <text:p text:style-name="Default">Anlage K1: Bebauungsplan + Begruendung</text:p>
      <text:p text:style-name="Default">Anlage K2: Auslegungsbekanntmachungen + Sitzungsprotokolle</text:p>
      <text:p text:style-name="Default">Anlage K3: Einwendungen Antragsteller im Aufstellungsverfahren</text:p>
      <text:p text:style-name="Default">Anlage K4: Eigentumsnachweis Antragsteller</text:p>
      <text:p text:style-name="Default">Anlage K5: Schallschutzgutachten / saP</text:p>
      <text:p text:style-name="Default">Anlage K6: Stellungnahmen Traeger oeffentlicher Belange</text:p>
      <text:p text:style-name="Default"/>
      <text:p text:style-name="Default">[Ort], [Datum]</text:p>
      <text:p text:style-name="Default">_______________________________</text:p>
      <text:p text:style-name="Default">[Anwalt]</text:p>
      <text:p text:style-name="Default"/>
      <text:h text:style-name="H3" text:outline-level="3">Felder im Template</text:h>
      <text:p text:style-name="Default">• [Antragsteller + Anschrift]</text:p>
      <text:p text:style-name="Default">• [Stadt/Gemeinde]</text:p>
      <text:p text:style-name="Default">• [B-Plan-Nr. + Bezeichnung]</text:p>
      <text:p text:style-name="Default">• [Beschluss- + Bekanntmachungsdatum]</text:p>
      <text:p text:style-name="Default">• [Konkrete Maengel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