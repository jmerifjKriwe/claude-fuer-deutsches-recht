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Aufhebungsvertrag (Arbeitsverhaeltnis)</text:h>
      <text:p text:style-name="Default"/>
      <text:p text:style-name="CenterBold">Aufhebungsvertrag</text:p>
      <text:p text:style-name="Default"/>
      <text:p text:style-name="Default">zwischen</text:p>
      <text:p text:style-name="Default"/>
      <text:p text:style-name="Center">[Firma der Arbeitgeberin] GmbH/AG, [Anschrift], vertreten durch [gesetzl. Vertreter]</text:p>
      <text:p text:style-name="Center">- nachfolgend "Arbeitgeber" -</text:p>
      <text:p text:style-name="Default"/>
      <text:p text:style-name="Default">und</text:p>
      <text:p text:style-name="Default"/>
      <text:p text:style-name="Center">[Vorname Nachname Arbeitnehmer], geboren [Geburtsdatum], [Anschrift]</text:p>
      <text:p text:style-name="Center">- nachfolgend "Arbeitnehmer" -</text:p>
      <text:p text:style-name="Default"/>
      <text:h text:style-name="H2" text:outline-level="2">Praeambel</text:h>
      <text:p text:style-name="Default">Die Parteien sind sich darueber einig, dass das Arbeitsverhaeltnis im beiderseitigen Einvernehmen beendet wird, um eine streitige Auseinandersetzung zu vermeiden. Die Initiative zur Beendigung geht von [Arbeitgeber/Arbeitnehmer] aus.</text:p>
      <text:h text:style-name="H2" text:outline-level="2">$ 1 Beendigung des Arbeitsverhaeltnisses</text:h>
      <text:p text:style-name="Default">(1) Das zwischen den Parteien bestehende Arbeitsverhaeltnis vom [Eintrittsdatum] endet aus betriebsbedingten Gruenden im gegenseitigen Einvernehmen mit Ablauf des [Beendigungsdatum].</text:p>
      <text:p text:style-name="Default">(2) [Wenn unwiderrufliche Freistellung gewuenscht:] Der Arbeitnehmer wird ab [Freistellungsdatum] unter Fortzahlung der vereinbarten Verguetung und unter Anrechnung von Resturlaub und Zeitguthaben unwiderruflich von der Arbeitsleistung freigestellt. Etwaige Zwischenverdienste werden gemaess $ 615 Satz 2 BGB angerechnet/nicht angerechnet [Streichung markieren].</text:p>
      <text:p text:style-name="Default">&lt;&lt;Hinweis: Pauschale formularmaessige Freistellungsklauseln sind nach Rechtsprechungslinie des BAG (zuletzt 25.03.2026 - 5 AZR 108/25, live verifizieren) AGB-rechtlich kritisch. Im Einzelvertrag mit konkretem Anlass dagegen unproblematisch.&gt;&gt;</text:p>
      <text:h text:style-name="H2" text:outline-level="2">$ 2 Abfindung</text:h>
      <text:p text:style-name="Default">(1) Der Arbeitgeber zahlt dem Arbeitnehmer als Ausgleich fuer den Verlust des Arbeitsplatzes eine einmalige Abfindung in Hoehe von [Betrag] EUR brutto entsprechend $ 24 Nr. 1 EStG ($ 34 EStG Fuenftelregelung).</text:p>
      <text:p text:style-name="Default">(2) Die Abfindung ist faellig mit Beendigung des Arbeitsverhaeltnisses und wird auf das dem Arbeitgeber bekannte Gehaltskonto des Arbeitnehmers ueberwiesen.</text:p>
      <text:p text:style-name="Default">(3) &lt;&lt;Hinweis: Steuerbegunstigung nach $ 34 EStG nur, wenn Auszahlung zusammengeballt in einem Veranlagungszeitraum erfolgt. Bei Splitting in zwei Jahre faellt Privileg weg.&gt;&gt;</text:p>
      <text:h text:style-name="H2" text:outline-level="2">$ 3 Resturlaub und Zeitguthaben</text:h>
      <text:p text:style-name="Default">(1) Der Arbeitnehmer hat zum Beendigungsdatum noch [Anzahl] Tage Resturlaub. Dieser wird [in natura waehrend der Freistellung gewaehrt / mit Beendigung in Geld abgegolten in Hoehe von [Betrag] EUR].</text:p>
      <text:p text:style-name="Default">(2) Hinsichtlich des gesetzlichen Mindesturlaubs gilt: Im bestehenden Arbeitsverhaeltnis kann auf den gesetzlichen Mindesturlaub nicht wirksam verzichtet werden (BAG-Linie 03.06.2025 - 9 AZR 104/24, live verifizieren); vertraglicher Mehrurlaub und Urlaubsabgeltung nach Beendigung sind disponibel.</text:p>
      <text:h text:style-name="H2" text:outline-level="2">$ 4 Verguetung, Variable, Boni</text:h>
      <text:p text:style-name="Default">(1) Bis zum Beendigungsdatum erhaelt der Arbeitnehmer die vertraglich vereinbarte Verguetung ungekuerzt.</text:p>
      <text:p text:style-name="Default">(2) Variable Verguetungsbestandteile, Tantiemen und Boni werden anteilig (pro rata temporis) abgerechnet. Bemessungszeitraum: [Jan-Dez/Geschaeftsjahr]; Stichtag: [Beendigungsdatum].</text:p>
      <text:h text:style-name="H2" text:outline-level="2">$ 5 Sperrzeit Arbeitslosengeld</text:h>
      <text:p text:style-name="Default">Der Arbeitnehmer wurde vom Arbeitgeber/dem unterzeichnenden Rechtsanwalt darauf hingewiesen, dass der Aufhebungsvertrag eine Sperrzeit beim Arbeitslosengeld nach $ 159 SGB III ausloesen kann, soweit die Voraussetzungen vorliegen. Die Parteien empfehlen rechtzeitige Vorsprache bei der Agentur fuer Arbeit.</text:p>
      <text:h text:style-name="H2" text:outline-level="2">$ 6 Wettbewerbsverbot, Geheimhaltung, Datenrueckgabe</text:h>
      <text:p text:style-name="Default">(1) Ein nachvertragliches Wettbewerbsverbot ist [vereinbart und folgt aus dem Arbeitsvertrag vom (Datum) / wird mit Beendigung des Arbeitsverhaeltnisses einvernehmlich aufgehoben].</text:p>
      <text:p text:style-name="Default">(2) Die Verschwiegenheitspflichten aus dem Arbeitsvertrag und dem GeschGehG bleiben ueber das Vertragsende hinaus bestehen.</text:p>
      <text:p text:style-name="Default">(3) Der Arbeitnehmer gibt saemtliche Arbeitsmittel, Firmenfahrzeug, Laptop, Schluessel, Datentraeger und Unterlagen mit dem Beendigungsdatum zurueck.</text:p>
      <text:h text:style-name="H2" text:outline-level="2">$ 7 Zeugnis</text:h>
      <text:p text:style-name="Default">Der Arbeitgeber erteilt dem Arbeitnehmer ein qualifiziertes Arbeitszeugnis ($ 109 GewO). Inhalt und Wortlaut werden in einer Anlage zu diesem Vertrag oder bis spaetestens [Datum] separat abgestimmt. Bei Streitigkeiten zum Wortlaut gilt die BAG-Linie zur Beweislast (live verifizieren auf bundesarbeitsgericht.de).</text:p>
      <text:h text:style-name="H2" text:outline-level="2">$ 8 Erledigungsklausel</text:h>
      <text:p text:style-name="Default">(1) Mit Erfuellung dieses Vertrages sind saemtliche wechselseitigen Ansprueche der Parteien aus dem Arbeitsverhaeltnis - gleich aus welchem Rechtsgrund, ob bekannt oder unbekannt - abschliessend erledigt.</text:p>
      <text:p text:style-name="Default">(2) Hiervon ausgenommen sind: a) Anspruch auf das qualifizierte Arbeitszeugnis ($ 7), b) Anspruch auf Auskunft und Auszahlung des nicht abgeloesten gesetzlichen Mindesturlaubs (BAG 03.06.2025 - 9 AZR 104/24), c) Ansprueche aus der betrieblichen Altersversorgung, d) unverjaehrte Ansprueche aus vorsaetzlichen Pflichtverletzungen.</text:p>
      <text:h text:style-name="H2" text:outline-level="2">$ 9 Schlussbestimmungen</text:h>
      <text:p text:style-name="Default">(1) Aenderungen und Ergaenzungen bedurfen der Schriftform; das gilt auch fuer die Aenderung dieser Schriftformklausel.</text:p>
      <text:p text:style-name="Default">(2) Sollten einzelne Bestimmungen unwirksam sein, bleibt der Vertrag im Uebrigen wirksam. Die unwirksame Bestimmung ist durch eine wirksame zu ersetzen, die dem wirtschaftlichen Zweck moeglichst nahe kommt.</text:p>
      <text:p text:style-name="Default">(3) Gerichtsstand fuer Streitigkeiten aus diesem Vertrag ist [Sitz Arbeitgeber], soweit gesetzlich zulaessig.</text:p>
      <text:p text:style-name="Default"/>
      <text:p text:style-name="Default">[Ort], den [Datum]</text:p>
      <text:p text:style-name="Default"/>
      <text:p text:style-name="Default">_______________________________     _______________________________</text:p>
      <text:p text:style-name="Default">Arbeitgeber                                                  Arbeitnehmer</text:p>
      <text:p text:style-name="Default"/>
      <text:h text:style-name="H3" text:outline-level="3">Felder im Template</text:h>
      <text:p text:style-name="Default">• [Firma der Arbeitgeberin]</text:p>
      <text:p text:style-name="Default">• [Anschrift Arbeitgeber]</text:p>
      <text:p text:style-name="Default">• [gesetzl. Vertreter Arbeitgeber]</text:p>
      <text:p text:style-name="Default">• [Vorname Nachname Arbeitnehmer]</text:p>
      <text:p text:style-name="Default">• [Geburtsdatum]</text:p>
      <text:p text:style-name="Default">• [Anschrift Arbeitnehmer]</text:p>
      <text:p text:style-name="Default">• [Eintrittsdatum]</text:p>
      <text:p text:style-name="Default">• [Beendigungsdatum]</text:p>
      <text:p text:style-name="Default">• [Freistellungsdatum]</text:p>
      <text:p text:style-name="Default">• [Abfindungsbetrag]</text:p>
      <text:p text:style-name="Default">• [Anzahl Resturlaubstage]</text:p>
      <text:p text:style-name="Default">• [Sitz Arbeitgeber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