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Klageschrift Kuendigungsschutzklage ($ 4 KSchG)</text:h>
      <text:p text:style-name="Center">An das Arbeitsgericht [Ort]</text:p>
      <text:p text:style-name="Center">[Strasse, Hausnummer]</text:p>
      <text:p text:style-name="Center">[PLZ Ort]</text:p>
      <text:p text:style-name="Default"/>
      <text:p text:style-name="CenterBold">Klage</text:p>
      <text:p text:style-name="Default"/>
      <text:p text:style-name="Default">des [Vorname Nachname], geboren am [Geburtsdatum], wohnhaft [Anschrift]</text:p>
      <text:p text:style-name="Default">- Klaeger -</text:p>
      <text:p text:style-name="Default">vertreten durch [Rechtsanwalt/Rechtsanwaeltin], [Kanzlei], [Anschrift]</text:p>
      <text:p text:style-name="Default"/>
      <text:p text:style-name="Default">gegen</text:p>
      <text:p text:style-name="Default"/>
      <text:p text:style-name="Default">die [Firma der Beklagten] GmbH/AG, vertreten durch die Geschaeftsfuehrung/den Vorstand [Name], [Anschrift]</text:p>
      <text:p text:style-name="Default">- Beklagte -</text:p>
      <text:p text:style-name="Default"/>
      <text:p text:style-name="CenterBold">wegen Kuendigungsschutzklage</text:p>
      <text:p text:style-name="Default"/>
      <text:p text:style-name="Default">Streitwert: vorlaeufig festgesetzt auf [Bruttomonatsgehalt x 3] EUR ($ 42 II GKG: ein Vierteljahresverdienst).</text:p>
      <text:h text:style-name="H2" text:outline-level="2">Antraege</text:h>
      <text:p text:style-name="Default">Namens und in Vollmacht der Klaegerseite stelle ich folgende Antraege:</text:p>
      <text:p text:style-name="Default"/>
      <text:p text:style-name="Default">1. Es wird festgestellt, dass das Arbeitsverhaeltnis der Parteien durch die Kuendigung der Beklagten vom [Datum der Kuendigungserklaerung], zugegangen am [Zugangsdatum], nicht aufgeloest worden ist.</text:p>
      <text:p text:style-name="Default">2. Hilfsweise: Festzustellen, dass das Arbeitsverhaeltnis auch durch andere Beendigungstatbestaende nicht aufgeloest worden ist und ueber den [vom Arbeitgeber genannten Beendigungstermin] hinaus zu unveraenderten Bedingungen fortbesteht.</text:p>
      <text:p text:style-name="Default">3. Die Beklagte wird verurteilt, die Klaegerseite ueber den Ablauf der Kuendigungsfrist hinaus zu den bisherigen Arbeitsbedingungen als [Position] weiter zu beschaeftigen (allgemeiner Weiterbeschaeftigungsanspruch nach BAG GS, st. Rspr., live verifizieren auf bundesarbeitsgericht.de).</text:p>
      <text:h text:style-name="H2" text:outline-level="2">Sachverhalt</text:h>
      <text:p text:style-name="Default">Die Klaegerseite ist seit [Eintrittsdatum] bei der Beklagten als [Position] zu einem Bruttomonatsentgelt von [Betrag] EUR beschaeftigt. Die regelmaessige Arbeitszeit betraegt [Stunden/Woche].</text:p>
      <text:p text:style-name="Default">Mit Schreiben vom [Datum der Kuendigung], zugegangen am [Zugangsdatum] - [Zustellungsart: per Bote / Einschreiben / persoenliche Uebergabe] - hat die Beklagte das Arbeitsverhaeltnis [ordentlich / ausserordentlich; mit/ohne soziale Auslauffrist] zum [Beendigungsdatum] gekuendigt. Die Kuendigung ist als Anlage K 1 beigefuegt.</text:p>
      <text:p text:style-name="Default">[Wenn besonderer Kuendigungsgrund von Arbeitgeber genannt: hier kurz beschreiben und bestreiten. Wenn keine Begruendung vorgetragen: hierauf hinweisen.]</text:p>
      <text:p text:style-name="Default">Die Beklagte beschaeftigt regelmaessig mehr als 10 Arbeitnehmer (Vollzeitaequivalente; $ 23 KSchG); das Kuendigungsschutzgesetz findet Anwendung. Das Arbeitsverhaeltnis besteht laenger als sechs Monate ($ 1 Abs. 1 KSchG).</text:p>
      <text:p text:style-name="Default">[Wenn Sonderkuendigungsschutz greift - Schwangerschaft, Mutterschutz, Schwerbehinderung, Betriebsrat, Wahlvorstand -: hier ausfuehren und entsprechende Belege als Anlagen K2 ff. einfuehren.]</text:p>
      <text:h text:style-name="H2" text:outline-level="2">Rechtliche Wuerdigung</text:h>
      <text:h text:style-name="H3" text:outline-level="3">1. Klagefrist $ 4 Satz 1 KSchG</text:h>
      <text:p text:style-name="Default">Die Klage ist binnen drei Wochen ab Zugang der schriftlichen Kuendigung beim Arbeitsgericht zu erheben. Die Kuendigung ist am [Zugangsdatum] zugegangen; die Drei-Wochen-Frist endet am [Ablauf 3 Wochen]. Die Klageerhebung erfolgt rechtzeitig.</text:p>
      <text:h text:style-name="H3" text:outline-level="3">2. Unwirksamkeit der Kuendigung</text:h>
      <text:p text:style-name="Default">Die Kuendigung ist aus folgenden Gruenden unwirksam:</text:p>
      <text:p text:style-name="Default">a) **Soziale Rechtfertigung $ 1 KSchG**: Die Beklagte hat keinen anerkannten Kuendigungsgrund vorgetragen. [Wenn betriebsbedingt: Sozialauswahl bestritten. Wenn personenbedingt: Negativprognose bestritten. Wenn verhaltensbedingt: Pflichtverletzung bestritten oder fehlende Abmahnung geruegt.]</text:p>
      <text:p text:style-name="Default">b) **Anhoerung des Betriebsrats** ($ 102 BetrVG): [Wenn BR existiert: ordnungsgemaesse Anhoerung bestritten / Vorliegen der Stellungnahme geruegt.]</text:p>
      <text:p text:style-name="Default">c) **Form $ 623 BGB**: [Wenn elektronisch zugegangen oder Unterschrift fraglich: hier ruegen.]</text:p>
      <text:p text:style-name="Default">d) **Massenentlassung $ 17 KSchG**: [Wenn Schwellenwerte beruehrt: Anzeigemangel ruegen.]</text:p>
      <text:h text:style-name="H2" text:outline-level="2">Beweismittel</text:h>
      <text:p text:style-name="Default">Zum Beweis der Sachverhaltsangaben dienen:</text:p>
      <text:p text:style-name="Default">- Anlage K 1: Kuendigungsschreiben der Beklagten vom [Datum]</text:p>
      <text:p text:style-name="Default">- Anlage K 2: Arbeitsvertrag vom [Datum]</text:p>
      <text:p text:style-name="Default">- Anlage K 3: [weitere relevante Unterlagen, z. B. Lohnabrechnungen, Schriftverkehr, BR-Anhoerung]</text:p>
      <text:p text:style-name="Default">- Zeugnis [Name, Adresse] zum Beweis von [Beweisthema]</text:p>
      <text:p text:style-name="Default">- Parteivernehmung der Klaegerseite ($ 448 ZPO)</text:p>
      <text:h text:style-name="H2" text:outline-level="2">Verguetungsanspruch / Annahmeverzug</text:h>
      <text:p text:style-name="Default">Die Klaegerseite haelt sich zur Erfuellung ihrer Arbeitsleistung weiter bereit und befindet sich in Annahmeverzug ($ 615 BGB iVm $ 11 KSchG). Verguetungsansprueche fuer den Zeitraum nach Ablauf der Kuendigungsfrist werden gesondert geltend gemacht; eine Bezifferung erfolgt im Verlauf des Verfahrens.</text:p>
      <text:h text:style-name="H2" text:outline-level="2">Schluss</text:h>
      <text:p text:style-name="Default">Es wird beantragt, einen Guetetermin baldmoeglichst zu bestimmen ($ 54 ArbGG).</text:p>
      <text:p text:style-name="Default"/>
      <text:p text:style-name="Default">[Ort], den [Datum]</text:p>
      <text:p text:style-name="Default"/>
      <text:p text:style-name="Default">[Unterschrift Rechtsanwalt/Rechtsanwaeltin]</text:p>
      <text:p text:style-name="Default">[Name in Druckbuchstaben, Berufsbezeichnung]</text:p>
      <text:p text:style-name="Default"/>
      <text:h text:style-name="H3" text:outline-level="3">Felder im Template</text:h>
      <text:p text:style-name="Default">• [Vorname Nachname Klaeger]</text:p>
      <text:p text:style-name="Default">• [Geburtsdatum]</text:p>
      <text:p text:style-name="Default">• [Anschrift Klaeger]</text:p>
      <text:p text:style-name="Default">• [Rechtsanwalt/Rechtsanwaeltin]</text:p>
      <text:p text:style-name="Default">• [Kanzlei]</text:p>
      <text:p text:style-name="Default">• [Firma der Beklagten]</text:p>
      <text:p text:style-name="Default">• [Anschrift Beklagte]</text:p>
      <text:p text:style-name="Default">• [Geschaeftsfuehrung/Vorstand]</text:p>
      <text:p text:style-name="Default">• [Eintrittsdatum]</text:p>
      <text:p text:style-name="Default">• [Position]</text:p>
      <text:p text:style-name="Default">• [Bruttomonatsentgelt]</text:p>
      <text:p text:style-name="Default">• [Stunden/Woche]</text:p>
      <text:p text:style-name="Default">• [Datum der Kuendigung]</text:p>
      <text:p text:style-name="Default">• [Zugangsdatum]</text:p>
      <text:p text:style-name="Default">• [Zustellungsart]</text:p>
      <text:p text:style-name="Default">• [Ordentlich/Ausserordentlich]</text:p>
      <text:p text:style-name="Default">• [Beendigungsdatum]</text:p>
      <text:p text:style-name="Default">• [Ablauf 3 Wochen]</text:p>
      <text:p text:style-name="Default">• [Ort des Arbeitsgerichts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