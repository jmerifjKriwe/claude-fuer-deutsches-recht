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Arbeitsvorlage. Keine Haftung, keine Gewähr. Nur zum Ausprobieren der Workflows; keine Rechtsberatung. Vor jeder Verwendung im Mandat anwaltlich prüfen.</text:p>
      <text:p text:style-name="Default"/>
      <text:h text:style-name="H1" text:outline-level="1">Einspruch gegen Steuerbescheid ($ 347 AO)</text:h>
      <text:p text:style-name="Center">An das Finanzamt [Ort]</text:p>
      <text:p text:style-name="Center">[Anschrift]</text:p>
      <text:p text:style-name="Default"/>
      <text:p text:style-name="Default">Steuernummer: [Nr.]</text:p>
      <text:p text:style-name="Default">Steuerart: [Einkommen-/Umsatz-/Koerperschaft-/Gewerbesteuer]</text:p>
      <text:p text:style-name="Default">Veranlagungszeitraum: [Jahr]</text:p>
      <text:p text:style-name="Default">Bescheid vom [Datum], zugegangen am [Zugangsdatum]</text:p>
      <text:p text:style-name="CenterBold">Einspruch</text:p>
      <text:p text:style-name="Default">gegen den oben bezeichneten Steuerbescheid wird hiermit form- und fristgerecht</text:p>
      <text:p text:style-name="CenterBold">EINSPRUCH</text:p>
      <text:p text:style-name="Default">eingelegt ($ 347 AO).</text:p>
      <text:h text:style-name="H2" text:outline-level="2">1. Antraege</text:h>
      <text:p text:style-name="Default">1. Den angefochtenen Steuerbescheid aufzuheben und die Steuer auf [Betrag] EUR festzusetzen.</text:p>
      <text:p text:style-name="Default">2. Hilfsweise: Die Steuer nach Massgabe der nachstehenden Ausfuehrungen zu reduzieren.</text:p>
      <text:p text:style-name="Default">3. Bis zur Entscheidung Aussetzung der Vollziehung gem. $ 361 II AO zu gewaehren.</text:p>
      <text:h text:style-name="H2" text:outline-level="2">2. Sachverhalt</text:h>
      <text:p text:style-name="Default">[Knappe Schilderung des steuerlich relevanten Sachverhalts, der Streitfragen und der Begruendung des FA im Bescheid.]</text:p>
      <text:h text:style-name="H2" text:outline-level="2">3. Rechtliche Begruendung</text:h>
      <text:p text:style-name="Default">Der angefochtene Bescheid ist rechtswidrig, weil [konkrete Pruefung der jeweiligen Tatbestaende]:</text:p>
      <text:p text:style-name="Default">- [Punkt 1: z. B. nicht beruecksichtigte Werbungskosten $$ 9, 9a EStG]</text:p>
      <text:p text:style-name="Default">- [Punkt 2: z. B. fehlerhafte Anwendung des Halbeinkuenfteverfahrens]</text:p>
      <text:p text:style-name="Default">- [Punkt 3: z. B. Verfahrensfehler $$ 119, 121 AO]</text:p>
      <text:p text:style-name="Default">- [Punkt 4: z. B. Schaetzungsfehler $ 162 AO]</text:p>
      <text:h text:style-name="H2" text:outline-level="2">4. Aussetzung der Vollziehung</text:h>
      <text:p text:style-name="Default">Es wird beantragt, gem. $ 361 II AO die Vollziehung des angefochtenen Bescheids in Hoehe der streitigen Steuerschuld auszusetzen. Es bestehen ernstliche Zweifel an der Rechtmaessigkeit (BFH IV B 12/15 — Maßstab; live verifizieren auf bfh.bund.de).</text:p>
      <text:h text:style-name="H2" text:outline-level="2">5. Anlagen</text:h>
      <text:p text:style-name="Default">Anlage S1: Steuerbescheid</text:p>
      <text:p text:style-name="Default">Anlage S2: Vollmacht</text:p>
      <text:p text:style-name="Default">Anlage S3: [Belege Werbungskosten / Vertraege / Bewertungs-Gutachten]</text:p>
      <text:p text:style-name="Default"/>
      <text:p text:style-name="Default">[Ort], [Datum]</text:p>
      <text:p text:style-name="Default">_______________________________</text:p>
      <text:p text:style-name="Default">[Steuerberater / Rechtsanwalt]</text:p>
      <text:p text:style-name="Default"/>
      <text:h text:style-name="H3" text:outline-level="3">Felder im Template</text:h>
      <text:p text:style-name="Default">• [Steuerpflichtiger + StNr]</text:p>
      <text:p text:style-name="Default">• [Veranlagungszeitraum]</text:p>
      <text:p text:style-name="Default">• [Bescheid-Datum]</text:p>
      <text:p text:style-name="Default">• [Zugangsdatum]</text:p>
      <text:p text:style-name="Default">• [Streitpunkte konkret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