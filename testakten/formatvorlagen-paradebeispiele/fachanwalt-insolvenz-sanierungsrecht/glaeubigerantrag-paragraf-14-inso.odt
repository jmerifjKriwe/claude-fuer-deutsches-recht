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Glaeubigerantrag ($ 14 InsO)</text:h>
      <text:p text:style-name="Center">An das Amtsgericht [Ort] — Insolvenzgericht —</text:p>
      <text:p text:style-name="Center">[Anschrift]</text:p>
      <text:p text:style-name="CenterBold">Antrag auf Eroeffnung des Insolvenzverfahrens</text:p>
      <text:p text:style-name="Default">des Glaeubigers</text:p>
      <text:p text:style-name="Default">[Glaeubiger Name/Firma], [Anschrift], vertreten durch [Anwalt/Anwaeltin]</text:p>
      <text:p text:style-name="Default"/>
      <text:p text:style-name="Default">ueber das Vermoegen</text:p>
      <text:p text:style-name="Default">der [Schuldner Firma], [HR-Eintragung], gesetzl. Vertretung [Name], Geschaeftsanschrift [Anschrift]</text:p>
      <text:p text:style-name="Default">— Schuldner —</text:p>
      <text:h text:style-name="H2" text:outline-level="2">1. Antrag</text:h>
      <text:p text:style-name="Default">Es wird beantragt, das Insolvenzverfahren ueber das Vermoegen der Schuldnerin zu eroeffnen ($ 14 InsO).</text:p>
      <text:h text:style-name="H2" text:outline-level="2">2. Forderung des Glaeubigers</text:h>
      <text:p text:style-name="Default">Der Glaeubiger hat gegen die Schuldnerin eine faellige und vollstreckbare Forderung in Hoehe von [Betrag] EUR. Sie ergibt sich aus [Rechtsgrund, z. B. Werklohnforderung, Mietruckstand, Darlehensrueckzahlung].</text:p>
      <text:p text:style-name="Default">Belege: vollstreckbarer Titel (Anlage A1: [z. B. Versaeumnisurteil LG (Ort) (Az.) vom (Datum)]) und Mahnungen Anlage A2, A3.</text:p>
      <text:h text:style-name="H2" text:outline-level="2">3. Eroeffnungsgrund</text:h>
      <text:p text:style-name="Default">[Option A — Zahlungsunfaehigkeit $ 17 InsO:] Die Schuldnerin ist zahlungsunfaehig. Trotz Mahnung und Vollstreckungsversuch ist die titulierte Forderung nicht beglichen. Vollstreckungsversuch durch Gerichtsvollzieher [Name] am [Datum] erfolglos (Anlage A4 — Pfaendungsprotokoll). Damit ist die Zahlungsunfaehigkeit indiziert ($ 17 Abs. 2 Satz 2 InsO).</text:p>
      <text:p text:style-name="Default">[Option B — Drohende Zahlungsunfaehigkeit / Ueberschuldung:] Aus folgenden Tatsachen ergibt sich Ueberschuldung gem. $ 19 InsO: [Liquiditaetsplan, Bilanzbild, Verbindlichkeiten-Saldenliste].</text:p>
      <text:h text:style-name="H2" text:outline-level="2">4. Rechtsschutzbeduerfnis</text:h>
      <text:p text:style-name="Default">Das rechtliche Interesse des Glaeubigers an der Verfahrenseroeffnung besteht darin, dass die Forderung im Falle eines Wettbewerbs einer geordneten anteiligen Befriedigung zugefuehrt wird ($$ 174 ff. InsO).</text:p>
      <text:h text:style-name="H2" text:outline-level="2">5. Anlagen</text:h>
      <text:p text:style-name="Default">- A1: Vollstreckbarer Titel</text:p>
      <text:p text:style-name="Default">- A2-A3: Mahnungen</text:p>
      <text:p text:style-name="Default">- A4: Fruchtloser Vollstreckungsversuch</text:p>
      <text:p text:style-name="Default">- A5: HR-Auszug Schuldnerin</text:p>
      <text:p text:style-name="Default">- A6: Vollmacht</text:p>
      <text:p text:style-name="Default">[Ort], [Datum]</text:p>
      <text:p text:style-name="Default"/>
      <text:p text:style-name="Default">_______________________________</text:p>
      <text:p text:style-name="Default">[Rechtsanwalt/Rechtsanwaeltin]</text:p>
      <text:p text:style-name="Default"/>
      <text:h text:style-name="H3" text:outline-level="3">Felder im Template</text:h>
      <text:p text:style-name="Default">• [Glaeubiger Name/Firma + Anschrift]</text:p>
      <text:p text:style-name="Default">• [Schuldner + HR + Anschrift]</text:p>
      <text:p text:style-name="Default">• [Forderungsbetrag]</text:p>
      <text:p text:style-name="Default">• [Rechtsgrund + Titel-Daten]</text:p>
      <text:p text:style-name="Default">• [Eroeffnungsgrund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